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5.667cm" style:rel-column-width="21845*"/>
    </style:style>
    <style:style style:name="Tabe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4.C1" style:family="table-cell">
      <style:table-cell-properties fo:padding="0.097cm" fo:border="0.5pt solid #000000"/>
    </style:style>
    <style:style style:name="Tabela14.A2" style:family="table-cell">
      <style:table-cell-properties fo:padding="0.097cm" fo:border-left="0.5pt solid #000000" fo:border-right="none" fo:border-top="none" fo:border-bottom="0.5pt solid #000000"/>
    </style:style>
    <style:style style:name="Tabela1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color="#ff0000" loext:opacity="100%" fo:font-weight="bold" officeooo:rsid="000ad8ca" officeooo:paragraph-rsid="001ade5c" style:font-weight-asian="bold" style:font-weight-complex="bold"/>
    </style:style>
    <style:style style:name="P2" style:family="paragraph" style:parent-style-name="Text_20_body">
      <style:text-properties officeooo:paragraph-rsid="001ade5c"/>
    </style:style>
    <style:style style:name="P3" style:family="paragraph" style:parent-style-name="Horizontal_20_Line">
      <style:text-properties officeooo:paragraph-rsid="001ade5c"/>
    </style:style>
    <style:style style:name="P4" style:family="paragraph" style:parent-style-name="Heading_20_2">
      <style:text-properties officeooo:paragraph-rsid="001ade5c"/>
    </style:style>
    <style:style style:name="P5" style:family="paragraph" style:parent-style-name="Table_20_Heading">
      <style:paragraph-properties fo:text-align="left" style:justify-single-word="false"/>
      <style:text-properties officeooo:paragraph-rsid="001ade5c"/>
    </style:style>
    <style:style style:name="P6" style:family="paragraph" style:parent-style-name="Table_20_Contents">
      <style:text-properties officeooo:paragraph-rsid="001ade5c"/>
    </style:style>
    <style:style style:name="P7" style:family="paragraph" style:parent-style-name="Table_20_Contents">
      <style:paragraph-properties fo:text-align="left" style:justify-single-word="false"/>
      <style:text-properties officeooo:paragraph-rsid="001ade5c"/>
    </style:style>
    <style:style style:name="P8" style:family="paragraph" style:parent-style-name="Text_20_body" style:list-style-name="L1">
      <style:text-properties officeooo:paragraph-rsid="001ade5c"/>
    </style:style>
    <style:style style:name="P9" style:family="paragraph" style:parent-style-name="Text_20_body" style:list-style-name="L2">
      <style:text-properties officeooo:paragraph-rsid="001ade5c"/>
    </style:style>
    <style:style style:name="T1" style:family="text">
      <style:text-properties fo:font-weight="bold"/>
    </style:style>
    <style:style style:name="T2" style:family="text">
      <style:text-properties fo:font-family="'Liberation Mono'" style:font-family-generic="modern" style:font-pitch="fixe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ÃO É O ENDEREÇO DA LOJA</text:p>
      <text:p text:style-name="P1"/>
      <text:p text:style-name="P2">Não, esse endereço <text:span text:style-name="T1">não é a URL da sua loja virtual</text:span>.</text:p>
      <text:p text:style-name="P2">O link que você enviou é uma página restrita (erro 403) do <text:span text:style-name="T1">dashboard de desenvolvedor da Shopify</text:span>, usada para gerenciar as <text:span text:style-name="T1">versões do seu aplicativo</text:span>, não a loja em si.</text:p>
      <text:p text:style-name="P3"/>
      <text:h text:style-name="P4" text:outline-level="2">✅ <text:span text:style-name="T1">Aqui estão os endereços corretos que você procura:</text:span></text:h>
      <table:table table:name="Tabela14" table:style-name="Tabela14">
        <table:table-column table:style-name="Tabela14.A" table:number-columns-repeated="3"/>
        <table:table-header-rows>
          <table:table-row>
            <table:table-cell table:style-name="Tabela14.A1" office:value-type="string">
              <text:p text:style-name="P5">O que você quer acessar</text:p>
            </table:table-cell>
            <table:table-cell table:style-name="Tabela14.A1" office:value-type="string">
              <text:p text:style-name="P5">URL correta</text:p>
            </table:table-cell>
            <table:table-cell table:style-name="Tabela14.C1" office:value-type="string">
              <text:p text:style-name="P5">Para que serve</text:p>
            </table:table-cell>
          </table:table-row>
        </table:table-header-rows>
        <table:table-row>
          <table:table-cell table:style-name="Tabela14.A2" office:value-type="string">
            <text:p text:style-name="P6"><text:span text:style-name="T1">Admin da sua loja</text:span> (painel de controle)</text:p>
          </table:table-cell>
          <table:table-cell table:style-name="Tabela14.A2" office:value-type="string">
            <text:p text:style-name="P6"><text:span text:style-name="T2">https://admin.shopify.com/store/smart-banner-test-ntcz3ygy</text:span></text:p>
          </table:table-cell>
          <table:table-cell table:style-name="Tabela14.C2" office:value-type="string">
            <text:p text:style-name="P7">Gerenciar produtos, pedidos, configurações.</text:p>
          </table:table-cell>
        </table:table-row>
        <table:table-row>
          <table:table-cell table:style-name="Tabela14.A2" office:value-type="string">
            <text:p text:style-name="P6"><text:span text:style-name="T1">Sua loja virtual</text:span> (site dos clientes)</text:p>
          </table:table-cell>
          <table:table-cell table:style-name="Tabela14.A2" office:value-type="string">
            <text:p text:style-name="P6"><text:span text:style-name="T2">https://smart-banner-test-ntcz3ygy.myshopify.com</text:span></text:p>
          </table:table-cell>
          <table:table-cell table:style-name="Tabela14.C2" office:value-type="string">
            <text:p text:style-name="P7">O site que seus clientes vão ver para comprar.</text:p>
          </table:table-cell>
        </table:table-row>
        <table:table-row>
          <table:table-cell table:style-name="Tabela14.A2" office:value-type="string">
            <text:p text:style-name="P6"><text:span text:style-name="T1">Seu App (Smart Alert Banner)</text:span></text:p>
          </table:table-cell>
          <table:table-cell table:style-name="Tabela14.A2" office:value-type="string">
            <text:p text:style-name="P6">No admin da loja, vá em <text:span text:style-name="T1">Apps</text:span> → <text:span text:style-name="T1">smart-alert-banner</text:span></text:p>
          </table:table-cell>
          <table:table-cell table:style-name="Tabela14.C2" office:value-type="string">
            <text:p text:style-name="P7">A página de configuração do seu banner.</text:p>
          </table:table-cell>
        </table:table-row>
      </table:table>
      <text:p text:style-name="P2"/>
      <text:p text:style-name="P3"/>
      <text:h text:style-name="P4" text:outline-level="2">🎯 <text:span text:style-name="T1">Como acessar sua loja virtual (vitrine):</text:span></text:h>
      <text:list text:style-name="L1">
        <text:list-item>
          <text:p text:style-name="P8">Faça login no <text:span text:style-name="T1">Admin da sua loja</text:span> (primeiro link da tabela).</text:p>
        </text:list-item>
        <text:list-item>
          <text:p text:style-name="P8">No menu lateral, clique em <text:span text:style-name="T1">"Canais de vendas"</text:span>.</text:p>
        </text:list-item>
        <text:list-item>
          <text:p text:style-name="P8">Clique em <text:span text:style-name="T1">"Loja virtual"</text:span>.</text:p>
        </text:list-item>
        <text:list-item>
          <text:p text:style-name="P8">Clique no botão <text:span text:style-name="T1">"Ver loja"</text:span> (geralmente no canto superior direito). Isso abrirá sua loja como os clientes a veem.</text:p>
        </text:list-item>
      </text:list>
      <text:p text:style-name="P2">O link que eu passei é o caminho mais direto para você ver sua loja online.</text:p>
      <text:p text:style-name="P3"/>
      <text:h text:style-name="P4" text:outline-level="2">🧭 <text:span text:style-name="T1">Resumo dos links importantes para você:</text:span></text:h>
      <text:list text:style-name="L2">
        <text:list-item>
          <text:p text:style-name="P9"><text:span text:style-name="T1">Para administrar a loja (adicionar produtos, ver pedidos):</text:span> use o primeiro link da tabela.</text:p>
        </text:list-item>
        <text:list-item>
          <text:p text:style-name="P9"><text:span text:style-name="T1">Para ver a loja como um cliente (site de compras):</text:span> use o segundo link da tabela.</text:p>
        </text:list-item>
        <text:list-item>
          <text:p text:style-name="P9"><text:span text:style-name="T1">Para configurar seu banner:</text:span> dentro do admin, vá em <text:span text:style-name="T1">Apps</text:span> e clique no nome do seu app.</text:p>
        </text:list-item>
      </text:list>
      <text:p text:style-name="P2">O link que você me enviou é uma área técnica de desenvolvimento. Foque nos links da tabela acima para gerenciar sua loja e ver seu trabalho no ar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7T12:27:18.834320700</meta:creation-date>
    <dc:date>2026-06-07T12:27:39.496859100</dc:date>
    <meta:editing-duration>PT21S</meta:editing-duration>
    <meta:editing-cycles>1</meta:editing-cycles>
    <meta:document-statistic meta:table-count="1" meta:image-count="0" meta:object-count="0" meta:page-count="1" meta:paragraph-count="27" meta:word-count="269" meta:character-count="1534" meta:non-whitespace-character-count="1299"/>
    <meta:generator>LibreOffice/26.2.3.2$Windows_X86_64 LibreOffice_project/70e089b17412e4cb7773e41413306b17a2328c34</meta:generator>
  </office:meta>
</office:document-meta>
</file>