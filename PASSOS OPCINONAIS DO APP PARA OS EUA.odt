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5.667cm" style:rel-column-width="21845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C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C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5.667cm" style:rel-column-width="21845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C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C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8.5cm" style:rel-column-width="32767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B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8.5cm" style:rel-column-width="32767*"/>
    </style:style>
    <style:style style:name="Tabe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1.B1" style:family="table-cell">
      <style:table-cell-properties fo:padding="0.097cm" fo:border="0.5pt solid #000000"/>
    </style:style>
    <style:style style:name="Tabela11.A2" style:family="table-cell">
      <style:table-cell-properties fo:padding="0.097cm" fo:border-left="0.5pt solid #000000" fo:border-right="none" fo:border-top="none" fo:border-bottom="0.5pt solid #000000"/>
    </style:style>
    <style:style style:name="Tabe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B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8.5cm" style:rel-column-width="32767*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3.B1" style:family="table-cell">
      <style:table-cell-properties fo:padding="0.097cm" fo:border="0.5pt solid #000000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5.667cm" style:rel-column-width="21845*"/>
    </style:style>
    <style:style style:name="Tabe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4.C1" style:family="table-cell">
      <style:table-cell-properties fo:padding="0.097cm" fo:border="0.5pt solid #000000"/>
    </style:style>
    <style:style style:name="Tabela14.A2" style:family="table-cell">
      <style:table-cell-properties fo:padding="0.097cm" fo:border-left="0.5pt solid #000000" fo:border-right="none" fo:border-top="none" fo:border-bottom="0.5pt solid #000000"/>
    </style:style>
    <style:style style:name="Tabela1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text-properties officeooo:paragraph-rsid="000344a3"/>
    </style:style>
    <style:style style:name="P2" style:family="paragraph" style:parent-style-name="Heading_20_3">
      <style:text-properties officeooo:paragraph-rsid="000344a3"/>
    </style:style>
    <style:style style:name="P3" style:family="paragraph" style:parent-style-name="Text_20_body">
      <style:text-properties officeooo:paragraph-rsid="000344a3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0344a3"/>
    </style:style>
    <style:style style:name="P5" style:family="paragraph" style:parent-style-name="Horizontal_20_Line">
      <style:text-properties officeooo:paragraph-rsid="000344a3"/>
    </style:style>
    <style:style style:name="P6" style:family="paragraph" style:parent-style-name="Text_20_body" style:list-style-name="L1">
      <style:text-properties officeooo:paragraph-rsid="000344a3"/>
    </style:style>
    <style:style style:name="P7" style:family="paragraph" style:parent-style-name="Text_20_body" style:list-style-name="L2">
      <style:text-properties officeooo:paragraph-rsid="000344a3"/>
    </style:style>
    <style:style style:name="P8" style:family="paragraph" style:parent-style-name="Text_20_body">
      <style:text-properties fo:color="#ff0000" loext:opacity="100%" fo:font-weight="bold" officeooo:rsid="0005090f" officeooo:paragraph-rsid="0005090f" style:font-weight-asian="bold" style:font-weight-complex="bold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Table_20_Heading">
      <style:paragraph-properties fo:text-align="left" style:justify-single-word="false"/>
    </style:style>
    <style:style style:name="P11" style:family="paragraph" style:parent-style-name="Table_20_Contents">
      <style:paragraph-properties fo:text-align="left" style:justify-single-word="false"/>
    </style:style>
    <style:style style:name="P12" style:family="paragraph" style:parent-style-name="Text_20_body">
      <style:text-properties fo:color="#ff0000" loext:opacity="100%" fo:font-weight="bold" officeooo:rsid="0005d8a7" officeooo:paragraph-rsid="0005d8a7" style:font-weight-asian="bold" style:font-weight-complex="bold"/>
    </style:style>
    <style:style style:name="P13" style:family="paragraph" style:parent-style-name="Heading_20_3">
      <style:text-properties officeooo:paragraph-rsid="0005d8a7"/>
    </style:style>
    <style:style style:name="P14" style:family="paragraph" style:parent-style-name="Text_20_body" style:list-style-name="L3"/>
    <style:style style:name="P15" style:family="paragraph" style:parent-style-name="Text_20_body">
      <style:text-properties fo:color="#ff0000" loext:opacity="100%" fo:font-weight="bold" officeooo:rsid="00069723" officeooo:paragraph-rsid="00069723" style:font-weight-asian="bold" style:font-weight-complex="bold"/>
    </style:style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>
      <style:text-properties fo:color="#ff0000" loext:opacity="100%" fo:font-weight="bold" officeooo:rsid="0006e18f" officeooo:paragraph-rsid="0006e18f" style:font-weight-asian="bold" style:font-weight-complex="bold"/>
    </style:style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2"/>
    <style:style style:name="P26" style:family="paragraph" style:parent-style-name="Text_20_body" style:list-style-name="L13"/>
    <style:style style:name="P27" style:family="paragraph" style:parent-style-name="Text_20_body">
      <style:text-properties fo:color="#ff0000" loext:opacity="100%" fo:font-weight="bold" officeooo:rsid="000740f5" officeooo:paragraph-rsid="000740f5" style:font-weight-asian="bold" style:font-weight-complex="bold"/>
    </style:style>
    <style:style style:name="P28" style:family="paragraph" style:parent-style-name="Text_20_body" style:list-style-name="L14"/>
    <style:style style:name="P29" style:family="paragraph" style:parent-style-name="Text_20_body" style:list-style-name="L15"/>
    <style:style style:name="P30" style:family="paragraph" style:parent-style-name="Text_20_body">
      <style:text-properties fo:color="#ff0000" loext:opacity="100%" fo:font-weight="bold" officeooo:rsid="00093073" officeooo:paragraph-rsid="00093073" style:font-weight-asian="bold" style:font-weight-complex="bold"/>
    </style:style>
    <style:style style:name="P31" style:family="paragraph" style:parent-style-name="Text_20_body" style:list-style-name="L16"/>
    <style:style style:name="P32" style:family="paragraph" style:parent-style-name="Text_20_body" style:list-style-name="L17"/>
    <style:style style:name="P33" style:family="paragraph" style:parent-style-name="Text_20_body" style:list-style-name="L18"/>
    <style:style style:name="P34" style:family="paragraph" style:parent-style-name="Text_20_body" style:list-style-name="L19"/>
    <style:style style:name="P35" style:family="paragraph" style:parent-style-name="Text_20_body">
      <style:text-properties fo:color="#ff0000" loext:opacity="100%" fo:font-weight="bold" officeooo:rsid="000ad8ca" officeooo:paragraph-rsid="000ad8ca" style:font-weight-asian="bold" style:font-weight-complex="bold"/>
    </style:style>
    <style:style style:name="P36" style:family="paragraph" style:parent-style-name="Text_20_body" style:list-style-name="L20"/>
    <style:style style:name="P37" style:family="paragraph" style:parent-style-name="Text_20_body" style:list-style-name="L21"/>
    <style:style style:name="T1" style:family="text">
      <style:text-properties fo:font-weight="bold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🎯 <text:span text:style-name="T1">Próximos passos (opcionais):</text:span></text:h>
      <text:h text:style-name="P2" text:outline-level="3">1. <text:span text:style-name="T1">Criar a API para salvar os dados</text:span></text:h>
      <text:p text:style-name="P3">Crie o arquivo <text:span text:style-name="T2">app/routes/api.settings.jsx</text:span>:</text:p>
      <text:p text:style-name="P4">export async function action({ request }) {<text:line-break/> <text:s/>const data = await request.json();<text:line-break/> <text:s/>// Salvar no banco de dados<text:line-break/> <text:s/>console.log("Salvando:", data);<text:line-break/> <text:s/>return new Response(JSON.stringify({ success: true }), {<text:line-break/> <text:s text:c="3"/>headers: { "Content-Type": "application/json" },<text:line-break/> <text:s/>});<text:line-break/>}</text:p>
      <text:h text:style-name="P2" text:outline-level="3">2. <text:span text:style-name="T1">Adicionar o Polaris (se quiser)</text:span></text:h>
      <text:p text:style-name="P3">Mas o app já está funcionando sem ele!</text:p>
      <text:h text:style-name="P2" text:outline-level="3">3. <text:span text:style-name="T1">Melhorar o design com CSS</text:span></text:h>
      <text:p text:style-name="P3">Adicione cores, fontes, responsividade.</text:p>
      <text:h text:style-name="P2" text:outline-level="3">4. <text:span text:style-name="T1">Conectar com Shopify Admin API</text:span></text:h>
      <text:p text:style-name="P3">Para mostrar o banner na loja real.</text:p>
      <text:h text:style-name="P2" text:outline-level="3">5. <text:span text:style-name="T1">Fazer deploy</text:span></text:h>
      <text:p text:style-name="P4">npm run deploy</text:p>
      <text:p text:style-name="P5"/>
      <text:h text:style-name="P1" text:outline-level="2">📸 <text:span text:style-name="T1">Você pode testar agora:</text:span></text:h>
      <text:list text:style-name="L1">
        <text:list-item>
          <text:p text:style-name="P6">Digite um texto</text:p>
        </text:list-item>
        <text:list-item>
          <text:p text:style-name="P6">Escolha um estado</text:p>
        </text:list-item>
        <text:list-item>
          <text:p text:style-name="P6">Clique em "Salvar banner"</text:p>
        </text:list-item>
        <text:list-item>
          <text:p text:style-name="P6">Veja o preview atualizando</text:p>
        </text:list-item>
      </text:list>
      <text:p text:style-name="P5"/>
      <text:h text:style-name="P1" text:outline-level="2">🎊 <text:span text:style-name="T1">Resumo da jornada:</text:span></text:h>
      <text:list text:style-name="L2">
        <text:list-item>
          <text:p text:style-name="P7">❌ Erro de <text:span text:style-name="T2">root.jsx</text:span> no lugar errado</text:p>
        </text:list-item>
        <text:list-item>
          <text:p text:style-name="P7">❌ Erro de importação do Remix vs React Router</text:p>
        </text:list-item>
        <text:list-item>
          <text:p text:style-name="P7">❌ Erro do Polaris (CommonJS)</text:p>
        </text:list-item>
        <text:list-item>
          <text:p text:style-name="P7">❌ Erro de CSS faltando</text:p>
        </text:list-item>
        <text:list-item>
          <text:p text:style-name="P7">✅ <text:span text:style-name="T1">SUCESSO!</text:span></text:p>
        </text:list-item>
      </text:list>
      <text:p text:style-name="P5"/>
      <text:p text:style-name="P3"><text:soft-page-break/><text:span text:style-name="T1">Compartilha uma print do formulário funcionando? Quero ver seu app pronto!</text:span> 🚀🐋</text:p>
      <text:p text:style-name="P3">Parabéns de novo, Camarada Baleia! Você é fera! 💪</text:p>
      <text:p text:style-name="P3"/>
      <text:p text:style-name="P8">COMO FAÇO PARA ABRIR O BLOCO <text:s/>DE NOTAS ATRAVÉS DO PROMPT?</text:p>
      <text:p text:style-name="P8"/>
      <text:p text:style-name="Text_20_body">Excelente pergunta! Aqui estão os comandos para abrir o Bloco de Notas em branco pelo prompt:</text:p>
      <text:p text:style-name="Horizontal_20_Line"/>
      <text:h text:style-name="Heading_20_2" text:outline-level="2">📝 <text:span text:style-name="T1">Comandos para abrir Bloco de Notas:</text:span></text:h>
      <text:h text:style-name="Heading_20_3" text:outline-level="3"><text:span text:style-name="T1">Opção 1: Abrir um arquivo específico (ou criar se não existir)</text:span></text:h>
      <text:p text:style-name="P9">notepad C:\caminho\para\arquivo.txt</text:p>
      <text:h text:style-name="Heading_20_3" text:outline-level="3"><text:span text:style-name="T1">Opção 2: Abrir o Bloco de Notas em branco (arquivo sem nome)</text:span></text:h>
      <text:p text:style-name="P9">notepad</text:p>
      <text:p text:style-name="Text_20_body"><text:span text:style-name="T1">Apenas </text:span><text:span text:style-name="T3">notepad</text:span><text:span text:style-name="T1"> + Enter</text:span> abre um arquivo novo e vazio.</text:p>
      <text:p text:style-name="Horizontal_20_Line"/>
      <text:h text:style-name="Heading_20_2" text:outline-level="2">🔧 <text:span text:style-name="T1">Para o seu projeto Shopify:</text:span></text:h>
      <text:h text:style-name="Heading_20_3" text:outline-level="3"><text:span text:style-name="T1">Abrir </text:span><text:span text:style-name="T3">_index.jsx</text:span><text:span text:style-name="T1"> em branco:</text:span></text:h>
      <text:p text:style-name="P9">notepad C:\Users\nelod\smart-alert-banner\app\routes\_index.jsx</text:p>
      <text:h text:style-name="Heading_20_3" text:outline-level="3"><text:span text:style-name="T1">Abrir </text:span><text:span text:style-name="T3">root.tsx</text:span><text:span text:style-name="T1"> em branco:</text:span></text:h>
      <text:p text:style-name="P9">notepad C:\Users\nelod\smart-alert-banner\app\root.tsx</text:p>
      <text:h text:style-name="Heading_20_3" text:outline-level="3"><text:span text:style-name="T1">Abrir um arquivo NOVO (que não existe ainda):</text:span></text:h>
      <text:p text:style-name="P9">notepad C:\Users\nelod\smart-alert-banner\novo-arquivo.jsx</text:p>
      <text:p text:style-name="Text_20_body">O Windows vai perguntar se você quer criar um novo arquivo.</text:p>
      <text:p text:style-name="Horizontal_20_Line"/>
      <text:h text:style-name="Heading_20_2" text:outline-level="2">💡 <text:span text:style-name="T1">Dicas úteis:</text:span></text:h>
      <table:table table:name="Tabela1" table:style-name="Tabela1">
        <table:table-column table:style-name="Tabela1.A" table:number-columns-repeated="2"/>
        <table:table-header-rows>
          <table:table-row>
            <table:table-cell table:style-name="Tabela1.A1" office:value-type="string">
              <text:p text:style-name="P10">Comando</text:p>
            </table:table-cell>
            <table:table-cell table:style-name="Tabela1.B1" office:value-type="string">
              <text:p text:style-name="P10">O que faz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2">notepad</text:span></text:p>
          </table:table-cell>
          <table:table-cell table:style-name="Tabela1.B2" office:value-type="string">
            <text:p text:style-name="P11">Abre bloco de notas em branco</text:p>
          </table:table-cell>
        </table:table-row>
        <table:table-row>
          <table:table-cell table:style-name="Tabela1.A2" office:value-type="string">
            <text:p text:style-name="Table_20_Contents"><text:span text:style-name="T2">notepad arquivo.txt</text:span></text:p>
          </table:table-cell>
          <table:table-cell table:style-name="Tabela1.B2" office:value-type="string">
            <text:p text:style-name="P11">Abre arquivo específico</text:p>
          </table:table-cell>
        </table:table-row>
        <table:table-row>
          <table:table-cell table:style-name="Tabela1.A2" office:value-type="string">
            <text:p text:style-name="Table_20_Contents"><text:span text:style-name="T2">start notepad</text:span></text:p>
          </table:table-cell>
          <table:table-cell table:style-name="Tabela1.B2" office:value-type="string">
            <text:p text:style-name="P11">Abre em janela separada</text:p>
          </table:table-cell>
        </table:table-row>
        <table:table-row>
          <table:table-cell table:style-name="Tabela1.A2" office:value-type="string">
            <text:p text:style-name="Table_20_Contents"><text:span text:style-name="T2">notepad ++</text:span></text:p>
          </table:table-cell>
          <table:table-cell table:style-name="Tabela1.B2" office:value-type="string">
            <text:p text:style-name="P11">Se tiver Notepad++ instalado</text:p>
          </table:table-cell>
        </table:table-row>
      </table:table>
      <text:p text:style-name="Text_20_body"><text:soft-page-break/></text:p>
      <text:p text:style-name="Horizontal_20_Line"/>
      <text:h text:style-name="Heading_20_2" text:outline-level="2">🚀 <text:span text:style-name="T1">Criar um arquivo do zero rapidamente:</text:span></text:h>
      <text:p text:style-name="P9"># Navegar até a pasta<text:line-break/>cd C:\Users\nelod\smart-alert-banner\app\routes<text:line-break/><text:line-break/># Abrir bloco de notas em branco<text:line-break/>notepad</text:p>
      <text:p text:style-name="Text_20_body">Depois é só escrever o código, salvar (<text:span text:style-name="T2">Ctrl+S</text:span>) com o nome que quiser (ex: <text:span text:style-name="T2">novo.jsx</text:span>).</text:p>
      <text:p text:style-name="Horizontal_20_Line"/>
      <text:p text:style-name="Text_20_body"><text:span text:style-name="T1">Agora você é ninja do Bloco de Notas pelo terminal!</text:span> 😎</text:p>
      <text:p text:style-name="Text_20_body"/>
      <text:p text:style-name="Text_20_body"/>
      <text:p text:style-name="P12">Melhorar o Design</text:p>
      <text:p text:style-name="P12"/>
      <text:h text:style-name="P13" text:outline-level="3">3. Melhorar o design com CSS</text:h>
      <text:p text:style-name="Text_20_body"><text:span text:style-name="T1">Perfeito!</text:span> Vamos deixar seu app com um design profissional e moderno.</text:p>
      <text:p text:style-name="Horizontal_20_Line"/>
      <text:h text:style-name="Heading_20_2" text:outline-level="2">🎨 <text:span text:style-name="T1">Melhorar o CSS do app</text:span></text:h>
      <text:h text:style-name="Heading_20_3" text:outline-level="3"><text:span text:style-name="T1">Passo 1: Criar um arquivo CSS separado</text:span></text:h>
      <text:p text:style-name="P9">notepad C:\Users\nelod\smart-alert-banner\app\styles\app.css</text:p>
      <text:p text:style-name="Text_20_body"><text:span text:style-name="T1">Cole este código:</text:span></text:p>
      <text:p text:style-name="P9">/* Reset e estilos globais */<text:line-break/>* {<text:line-break/> <text:s/>margin: 0;<text:line-break/> <text:s/>padding: 0;<text:line-break/> <text:s/>box-sizing: border-box;<text:line-break/>}<text:line-break/><text:line-break/>body {<text:line-break/> <text:s/>font-family: 'Inter', -apple-system, BlinkMacSystemFont, 'Segoe UI', Roboto, 'Helvetica Neue', sans-serif;<text:line-break/> <text:s/>background: linear-gradient(135deg, #667eea 0%, #764ba2 100%);<text:line-break/> <text:s/>min-height: 100vh;<text:line-break/> <text:s/>padding: 20px;<text:line-break/>}<text:line-break/><text:line-break/>/* Container principal */<text:line-break/>.container {<text:line-break/> <text:s/>max-width: 1200px;<text:line-break/> <text:s/>margin: 0 auto;<text:line-break/>}<text:line-break/><text:soft-page-break/><text:line-break/>/* Header */<text:line-break/>.header {<text:line-break/> <text:s/>text-align: center;<text:line-break/> <text:s/>margin-bottom: 40px;<text:line-break/>}<text:line-break/><text:line-break/>.header h1 {<text:line-break/> <text:s/>font-size: 2.5rem;<text:line-break/> <text:s/>color: white;<text:line-break/> <text:s/>margin-bottom: 10px;<text:line-break/> <text:s/>text-shadow: 2px 2px 4px rgba(0,0,0,0.2);<text:line-break/>}<text:line-break/><text:line-break/>.header p {<text:line-break/> <text:s/>color: rgba(255,255,255,0.9);<text:line-break/> <text:s/>font-size: 1.1rem;<text:line-break/>}<text:line-break/><text:line-break/>/* Cards */<text:line-break/>.card {<text:line-break/> <text:s/>background: white;<text:line-break/> <text:s/>border-radius: 16px;<text:line-break/> <text:s/>padding: 30px;<text:line-break/> <text:s/>margin-bottom: 30px;<text:line-break/> <text:s/>box-shadow: 0 10px 40px rgba(0,0,0,0.1);<text:line-break/> <text:s/>transition: transform 0.3s ease, box-shadow 0.3s ease;<text:line-break/>}<text:line-break/><text:line-break/>.card:hover {<text:line-break/> <text:s/>transform: translateY(-5px);<text:line-break/> <text:s/>box-shadow: 0 20px 60px rgba(0,0,0,0.15);<text:line-break/>}<text:line-break/><text:line-break/>.card h2 {<text:line-break/> <text:s/>color: #333;<text:line-break/> <text:s/>margin-bottom: 20px;<text:line-break/> <text:s/>font-size: 1.5rem;<text:line-break/> <text:s/>border-left: 4px solid #ff6b00;<text:line-break/> <text:s/>padding-left: 15px;<text:line-break/>}<text:line-break/><text:line-break/>/* Formulário */<text:line-break/>.form-group {<text:line-break/> <text:s/>margin-bottom: 25px;<text:line-break/>}<text:line-break/><text:line-break/>label {<text:line-break/> <text:s/>display: block;<text:line-break/> <text:s/>margin-bottom: 8px;<text:line-break/> <text:s/>font-weight: 600;<text:line-break/> <text:s/>color: #333;<text:line-break/> <text:s/>font-size: 0.9rem;<text:line-break/> <text:s/>text-transform: uppercase;<text:line-break/> <text:s/>letter-spacing: 0.5px;<text:line-break/>}<text:line-break/><text:line-break/>input, select {<text:line-break/> <text:s/>width: 100%;<text:line-break/> <text:s/>padding: 12px 16px;<text:line-break/> <text:s/>border: 2px solid #e0e0e0;<text:line-break/> <text:s/>border-radius: 8px;<text:line-break/> <text:s/>font-size: 1rem;<text:line-break/> <text:s/>transition: all 0.3s ease;<text:line-break/><text:soft-page-break/> <text:s/>font-family: inherit;<text:line-break/>}<text:line-break/><text:line-break/>input:focus, select:focus {<text:line-break/> <text:s/>outline: none;<text:line-break/> <text:s/>border-color: #ff6b00;<text:line-break/> <text:s/>box-shadow: 0 0 0 3px rgba(255,107,0,0.1);<text:line-break/>}<text:line-break/><text:line-break/>input:hover, select:hover {<text:line-break/> <text:s/>border-color: #ff6b00;<text:line-break/>}<text:line-break/><text:line-break/>/* Botão */<text:line-break/>.btn-save {<text:line-break/> <text:s/>background: linear-gradient(135deg, #ff6b00 0%, #ff8c00 100%);<text:line-break/> <text:s/>color: white;<text:line-break/> <text:s/>border: none;<text:line-break/> <text:s/>padding: 12px 30px;<text:line-break/> <text:s/>border-radius: 8px;<text:line-break/> <text:s/>font-size: 1rem;<text:line-break/> <text:s/>font-weight: 600;<text:line-break/> <text:s/>cursor: pointer;<text:line-break/> <text:s/>transition: all 0.3s ease;<text:line-break/> <text:s/>width: 100%;<text:line-break/> <text:s/>text-transform: uppercase;<text:line-break/> <text:s/>letter-spacing: 1px;<text:line-break/>}<text:line-break/><text:line-break/>.btn-save:hover:not(:disabled) {<text:line-break/> <text:s/>transform: translateY(-2px);<text:line-break/> <text:s/>box-shadow: 0 5px 20px rgba(255,107,0,0.4);<text:line-break/>}<text:line-break/><text:line-break/>.btn-save:disabled {<text:line-break/> <text:s/>opacity: 0.6;<text:line-break/> <text:s/>cursor: not-allowed;<text:line-break/>}<text:line-break/><text:line-break/>/* Preview do banner */<text:line-break/>.preview {<text:line-break/> <text:s/>background: linear-gradient(135deg, #667eea 0%, #764ba2 100%);<text:line-break/> <text:s/>padding: 40px;<text:line-break/> <text:s/>border-radius: 16px;<text:line-break/> <text:s/>text-align: center;<text:line-break/>}<text:line-break/><text:line-break/>.banner-preview {<text:line-break/> <text:s/>background: linear-gradient(135deg, #ff6b00 0%, #ff8c00 100%);<text:line-break/> <text:s/>color: white;<text:line-break/> <text:s/>padding: 25px;<text:line-break/> <text:s/>border-radius: 12px;<text:line-break/> <text:s/>font-size: 1.5rem;<text:line-break/> <text:s/>font-weight: 600;<text:line-break/> <text:s/>text-align: center;<text:line-break/> <text:s/>box-shadow: 0 10px 30px rgba(0,0,0,0.2);<text:line-break/> <text:s/>transition: all 0.3s ease;<text:line-break/>}<text:line-break/><text:line-break/>.banner-preview:hover {<text:line-break/> <text:s/>transform: scale(1.02);<text:line-break/> <text:s/>box-shadow: 0 15px 40px rgba(0,0,0,0.3);<text:line-break/>}<text:line-break/><text:line-break/><text:soft-page-break/>.banner-preview span {<text:line-break/> <text:s/>display: block;<text:line-break/> <text:s/>font-size: 0.9rem;<text:line-break/> <text:s/>margin-top: 10px;<text:line-break/> <text:s/>opacity: 0.9;<text:line-break/>}<text:line-break/><text:line-break/>/* Alertas */<text:line-break/>.alert-success {<text:line-break/> <text:s/>background: linear-gradient(135deg, #11998e 0%, #38ef7d 100%);<text:line-break/> <text:s/>color: white;<text:line-break/> <text:s/>padding: 15px 20px;<text:line-break/> <text:s/>border-radius: 8px;<text:line-break/> <text:s/>margin-bottom: 20px;<text:line-break/> <text:s/>animation: slideIn 0.5s ease;<text:line-break/>}<text:line-break/><text:line-break/>.alert-error {<text:line-break/> <text:s/>background: linear-gradient(135deg, #f093fb 0%, #f5576c 100%);<text:line-break/> <text:s/>color: white;<text:line-break/> <text:s/>padding: 15px 20px;<text:line-break/> <text:s/>border-radius: 8px;<text:line-break/> <text:s/>margin-bottom: 20px;<text:line-break/> <text:s/>animation: slideIn 0.5s ease;<text:line-break/>}<text:line-break/><text:line-break/>/* Animações */<text:line-break/>@keyframes slideIn {<text:line-break/> <text:s/>from {<text:line-break/> <text:s text:c="3"/>transform: translateY(-20px);<text:line-break/> <text:s text:c="3"/>opacity: 0;<text:line-break/> <text:s/>}<text:line-break/> <text:s/>to {<text:line-break/> <text:s text:c="3"/>transform: translateY(0);<text:line-break/> <text:s text:c="3"/>opacity: 1;<text:line-break/> <text:s/>}<text:line-break/>}<text:line-break/><text:line-break/>@keyframes fadeIn {<text:line-break/> <text:s/>from {<text:line-break/> <text:s text:c="3"/>opacity: 0;<text:line-break/> <text:s/>}<text:line-break/> <text:s/>to {<text:line-break/> <text:s text:c="3"/>opacity: 1;<text:line-break/> <text:s/>}<text:line-break/>}<text:line-break/><text:line-break/>/* Responsivo */<text:line-break/>@media (max-width: 768px) {<text:line-break/> <text:s/>body {<text:line-break/> <text:s text:c="3"/>padding: 10px;<text:line-break/> <text:s/>}<text:line-break/> <text:s/><text:line-break/> <text:s/>.card {<text:line-break/> <text:s text:c="3"/>padding: 20px;<text:line-break/> <text:s/>}<text:line-break/> <text:s/><text:line-break/> <text:s/>.header h1 {<text:line-break/> <text:s text:c="3"/>font-size: 1.8rem;<text:line-break/> <text:s/>}<text:line-break/> <text:s/><text:line-break/> <text:s/>.banner-preview {<text:line-break/> <text:s text:c="3"/>font-size: 1.2rem;<text:line-break/> <text:s text:c="3"/>padding: 15px;<text:line-break/><text:soft-page-break/> <text:s/>}<text:line-break/> <text:s/><text:line-break/> <text:s/>.preview {<text:line-break/> <text:s text:c="3"/>padding: 20px;<text:line-break/> <text:s/>}<text:line-break/>}<text:line-break/><text:line-break/>/* Grid responsivo */<text:line-break/>@media (min-width: 768px) {<text:line-break/> <text:s/>.form-row {<text:line-break/> <text:s text:c="3"/>display: grid;<text:line-break/> <text:s text:c="3"/>grid-template-columns: 1fr 1fr;<text:line-break/> <text:s text:c="3"/>gap: 20px;<text:line-break/> <text:s/>}<text:line-break/>}<text:line-break/><text:line-break/>/* Loading spinner */<text:line-break/>@keyframes spin {<text:line-break/> <text:s/>0% { transform: rotate(0deg); }<text:line-break/> <text:s/>100% { transform: rotate(360deg); }<text:line-break/>}<text:line-break/><text:line-break/>.loading-spinner {<text:line-break/> <text:s/>display: inline-block;<text:line-break/> <text:s/>width: 20px;<text:line-break/> <text:s/>height: 20px;<text:line-break/> <text:s/>border: 3px solid rgba(255,255,255,0.3);<text:line-break/> <text:s/>border-radius: 50%;<text:line-break/> <text:s/>border-top-color: white;<text:line-break/> <text:s/>animation: spin 0.8s linear infinite;<text:line-break/> <text:s/>margin-right: 10px;<text:line-break/> <text:s/>vertical-align: middle;<text:line-break/>}<text:line-break/><text:line-break/>/* Tooltip */<text:line-break/>.info-icon {<text:line-break/> <text:s/>display: inline-block;<text:line-break/> <text:s/>width: 16px;<text:line-break/> <text:s/>height: 16px;<text:line-break/> <text:s/>background: #ff6b00;<text:line-break/> <text:s/>color: white;<text:line-break/> <text:s/>border-radius: 50%;<text:line-break/> <text:s/>text-align: center;<text:line-break/> <text:s/>font-size: 12px;<text:line-break/> <text:s/>line-height: 16px;<text:line-break/> <text:s/>margin-left: 8px;<text:line-break/> <text:s/>cursor: help;<text:line-break/> <text:s/>position: relative;<text:line-break/>}<text:line-break/><text:line-break/>.info-icon:hover::after {<text:line-break/> <text:s/>content: attr(data-tooltip);<text:line-break/> <text:s/>position: absolute;<text:line-break/> <text:s/>bottom: 100%;<text:line-break/> <text:s/>left: 50%;<text:line-break/> <text:s/>transform: translateX(-50%);<text:line-break/> <text:s/>background: #333;<text:line-break/> <text:s/>color: white;<text:line-break/> <text:s/>padding: 5px 10px;<text:line-break/> <text:s/>border-radius: 4px;<text:line-break/> <text:s/>font-size: 12px;<text:line-break/> <text:s/>white-space: nowrap;<text:line-break/> <text:s/>z-index: 10;<text:line-break/>}</text:p>
      <text:p text:style-name="Horizontal_20_Line"><text:soft-page-break/></text:p>
      <text:h text:style-name="Heading_20_3" text:outline-level="3"><text:span text:style-name="T1">Passo 2: Atualizar o </text:span><text:span text:style-name="T3">root.tsx</text:span><text:span text:style-name="T1"> para carregar o CSS</text:span></text:h>
      <text:p text:style-name="P9">notepad C:\Users\nelod\smart-alert-banner\app\root.tsx</text:p>
      <text:p text:style-name="P9">import { Outlet, Meta, Links } from "react-router";<text:line-break/>import styles from "~/styles/app.css?url";<text:line-break/><text:line-break/>export const links = () =&gt; [<text:line-break/> <text:s/>{ rel: "stylesheet", href: styles },<text:line-break/> <text:s/>{ rel: "preconnect", href: "https://fonts.googleapis.com" },<text:line-break/> <text:s/>{<text:line-break/> <text:s text:c="3"/>rel: "preconnect",<text:line-break/> <text:s text:c="3"/>href: "https://fonts.gstatic.com",<text:line-break/> <text:s text:c="3"/>crossOrigin: "anonymous",<text:line-break/> <text:s/>},<text:line-break/> <text:s/>{<text:line-break/> <text:s text:c="3"/>rel: "stylesheet",<text:line-break/> <text:s text:c="3"/>href: "https://fonts.googleapis.com/css2?family=Inter:wght@400;500;600;700;800&amp;display=swap",<text:line-break/> <text:s/>},<text:line-break/>];<text:line-break/><text:line-break/>export const meta = () =&gt; [<text:line-break/> <text:s/>{ title: "Smart Alert Banner - Shopify App" },<text:line-break/> <text:s/>{ name: "description", content: "Gerencie banners inteligentes para sua loja Shopify" },<text:line-break/> <text:s/>{ viewport: "width=device-width,initial-scale=1" },<text:line-break/>];<text:line-break/><text:line-break/>export default function Root() {<text:line-break/> <text:s/>return (<text:line-break/> <text:s text:c="3"/>&lt;html lang="pt-BR"&gt;<text:line-break/> <text:s text:c="5"/>&lt;head&gt;<text:line-break/> <text:s text:c="7"/>&lt;Meta /&gt;<text:line-break/> <text:s text:c="7"/>&lt;Links /&gt;<text:line-break/> <text:s text:c="5"/>&lt;/head&gt;<text:line-break/> <text:s text:c="5"/>&lt;body&gt;<text:line-break/> <text:s text:c="7"/>&lt;Outlet /&gt;<text:line-break/> <text:s text:c="5"/>&lt;/body&gt;<text:line-break/> <text:s text:c="3"/>&lt;/html&gt;<text:line-break/> <text:s/>);<text:line-break/>}</text:p>
      <text:p text:style-name="Horizontal_20_Line"/>
      <text:h text:style-name="Heading_20_3" text:outline-level="3"><text:span text:style-name="T1">Passo 3: Atualizar o </text:span><text:span text:style-name="T3">_index.jsx</text:span><text:span text:style-name="T1"> com o novo HTML estruturado</text:span></text:h>
      <text:p text:style-name="P9">notepad C:\Users\nelod\smart-alert-banner\app\routes\_index.jsx</text:p>
      <text:p text:style-name="P9">import { useState } from "react";<text:line-break/><text:line-break/>export default function Index() {<text:line-break/> <text:s/>const [bannerText, setBannerText] = useState("");<text:line-break/> <text:s/>const [targetState, setTargetState] = useState("CA");<text:line-break/> <text:s/>const [saving, setSaving] = useState(false);<text:line-break/> <text:s/>const [success, setSuccess] = useState(false);<text:line-break/> <text:s/>const [error, setError] = useState(null);<text:line-break/><text:line-break/> <text:s/>const saveSettings = async () =&gt; {<text:line-break/> <text:s text:c="3"/>setSaving(true);<text:line-break/><text:soft-page-break/> <text:s text:c="3"/>setError(null);<text:line-break/> <text:s text:c="3"/><text:line-break/> <text:s text:c="3"/>try {<text:line-break/> <text:s text:c="5"/>const response = await fetch("/api/settings", {<text:line-break/> <text:s text:c="7"/>method: "POST",<text:line-break/> <text:s text:c="7"/>headers: { "Content-Type": "application/json" },<text:line-break/> <text:s text:c="7"/>body: JSON.stringify({ bannerText, targetState }),<text:line-break/> <text:s text:c="5"/>});<text:line-break/> <text:s text:c="5"/><text:line-break/> <text:s text:c="5"/>if (response.ok) {<text:line-break/> <text:s text:c="7"/>setSuccess(true);<text:line-break/> <text:s text:c="7"/>setTimeout(() =&gt; setSuccess(false), 3000);<text:line-break/> <text:s text:c="5"/>} else {<text:line-break/> <text:s text:c="7"/>setError("Erro ao salvar as configurações");<text:line-break/> <text:s text:c="5"/>}<text:line-break/> <text:s text:c="3"/>} catch (err) {<text:line-break/> <text:s text:c="5"/>setError("Erro de conexão com o servidor");<text:line-break/> <text:s text:c="3"/>} finally {<text:line-break/> <text:s text:c="5"/>setSaving(false);<text:line-break/> <text:s text:c="3"/>}<text:line-break/> <text:s/>};<text:line-break/><text:line-break/> <text:s/>const getStateLabel = (value) =&gt; {<text:line-break/> <text:s text:c="3"/>const states = {<text:line-break/> <text:s text:c="5"/>CA: "Califórnia",<text:line-break/> <text:s text:c="5"/>TX: "Texas",<text:line-break/> <text:s text:c="5"/>NY: "Nova York",<text:line-break/> <text:s text:c="5"/>FL: "Flórida"<text:line-break/> <text:s text:c="3"/>};<text:line-break/> <text:s text:c="3"/>return states[value];<text:line-break/> <text:s/>};<text:line-break/><text:line-break/> <text:s/>return (<text:line-break/> <text:s text:c="3"/>&lt;div className="container"&gt;<text:line-break/> <text:s text:c="5"/>&lt;div className="header"&gt;<text:line-break/> <text:s text:c="7"/>&lt;h1&gt;🚀 Smart Alert Banner&lt;/h1&gt;<text:line-break/> <text:s text:c="7"/>&lt;p&gt;Configure banners inteligentes para sua loja Shopify&lt;/p&gt;<text:line-break/> <text:s text:c="5"/>&lt;/div&gt;<text:line-break/><text:line-break/> <text:s text:c="5"/>{success &amp;&amp; (<text:line-break/> <text:s text:c="7"/>&lt;div className="alert-success"&gt;<text:line-break/> <text:s text:c="9"/>✅ Configurações salvas com sucesso!<text:line-break/> <text:s text:c="7"/>&lt;/div&gt;<text:line-break/> <text:s text:c="5"/>)}<text:line-break/><text:line-break/> <text:s text:c="5"/>{error &amp;&amp; (<text:line-break/> <text:s text:c="7"/>&lt;div className="alert-error"&gt;<text:line-break/> <text:s text:c="9"/>❌ {error}<text:line-break/> <text:s text:c="7"/>&lt;/div&gt;<text:line-break/> <text:s text:c="5"/>)}<text:line-break/><text:line-break/> <text:s text:c="5"/>&lt;div className="card"&gt;<text:line-break/> <text:s text:c="7"/>&lt;h2&gt;⚙️ Configurações do Banner&lt;/h2&gt;<text:line-break/> <text:s text:c="7"/><text:line-break/> <text:s text:c="7"/>&lt;div className="form-group"&gt;<text:line-break/> <text:s text:c="9"/>&lt;label&gt;<text:line-break/> <text:s text:c="11"/>📝 Texto do banner<text:line-break/> <text:s text:c="11"/>&lt;span className="info-icon" data-tooltip="Digite a mensagem que será exibida no banner"&gt;?&lt;/span&gt;<text:line-break/> <text:s text:c="9"/>&lt;/label&gt;<text:line-break/> <text:s text:c="9"/>&lt;input<text:line-break/> <text:s text:c="11"/>type="text"<text:line-break/> <text:s text:c="11"/>value={bannerText}<text:line-break/> <text:s text:c="11"/>onChange={(e) =&gt; setBannerText(e.target.value)}<text:line-break/><text:soft-page-break/> <text:s text:c="11"/>placeholder="Ex: Frete grátis para clientes da Califórnia!"<text:line-break/> <text:s text:c="9"/>/&gt;<text:line-break/> <text:s text:c="7"/>&lt;/div&gt;<text:line-break/> <text:s text:c="7"/><text:line-break/> <text:s text:c="7"/>&lt;div className="form-group"&gt;<text:line-break/> <text:s text:c="9"/>&lt;label&gt;📍 Estado alvo&lt;/label&gt;<text:line-break/> <text:s text:c="9"/>&lt;select<text:line-break/> <text:s text:c="11"/>value={targetState}<text:line-break/> <text:s text:c="11"/>onChange={(e) =&gt; setTargetState(e.target.value)}<text:line-break/> <text:s text:c="9"/>&gt;<text:line-break/> <text:s text:c="11"/>&lt;option value="CA"&gt;Califórnia (CA)&lt;/option&gt;<text:line-break/> <text:s text:c="11"/>&lt;option value="TX"&gt;Texas (TX)&lt;/option&gt;<text:line-break/> <text:s text:c="11"/>&lt;option value="NY"&gt;Nova York (NY)&lt;/option&gt;<text:line-break/> <text:s text:c="11"/>&lt;option value="FL"&gt;Flórida (FL)&lt;/option&gt;<text:line-break/> <text:s text:c="9"/>&lt;/select&gt;<text:line-break/> <text:s text:c="7"/>&lt;/div&gt;<text:line-break/> <text:s text:c="7"/><text:line-break/> <text:s text:c="7"/>&lt;button <text:line-break/> <text:s text:c="9"/>className="btn-save" <text:line-break/> <text:s text:c="9"/>onClick={saveSettings} <text:line-break/> <text:s text:c="9"/>disabled={saving}<text:line-break/> <text:s text:c="7"/>&gt;<text:line-break/> <text:s text:c="9"/>{saving ? (<text:line-break/> <text:s text:c="11"/>&lt;&gt;<text:line-break/> <text:s text:c="13"/>&lt;span className="loading-spinner"&gt;&lt;/span&gt;<text:line-break/> <text:s text:c="13"/>Salvando...<text:line-break/> <text:s text:c="11"/>&lt;/&gt;<text:line-break/> <text:s text:c="9"/>) : (<text:line-break/> <text:s text:c="11"/>"💾 Salvar banner"<text:line-break/> <text:s text:c="9"/>)}<text:line-break/> <text:s text:c="7"/>&lt;/button&gt;<text:line-break/> <text:s text:c="5"/>&lt;/div&gt;<text:line-break/><text:line-break/> <text:s text:c="5"/>&lt;div className="preview"&gt;<text:line-break/> <text:s text:c="7"/>&lt;h2 style={{ color: "white", marginBottom: "20px" }}&gt;👁️ Preview do Banner&lt;/h2&gt;<text:line-break/> <text:s text:c="7"/>&lt;div className="banner-preview"&gt;<text:line-break/> <text:s text:c="9"/>{bannerText || "🎉 Seu texto aqui"}<text:line-break/> <text:s text:c="9"/>&lt;span&gt;📍 Exibindo para: {getStateLabel(targetState)} ({targetState})&lt;/span&gt;<text:line-break/> <text:s text:c="7"/>&lt;/div&gt;<text:line-break/> <text:s text:c="7"/>&lt;p style={{ color: "rgba(255,255,255,0.8)", marginTop: "15px", fontSize: "0.9rem" }}&gt;<text:line-break/> <text:s text:c="9"/>* O banner será exibido apenas para clientes do estado selecionado<text:line-break/> <text:s text:c="7"/>&lt;/p&gt;<text:line-break/> <text:s text:c="5"/>&lt;/div&gt;<text:line-break/> <text:s text:c="3"/>&lt;/div&gt;<text:line-break/> <text:s/>);<text:line-break/>}</text:p>
      <text:p text:style-name="Horizontal_20_Line"/>
      <text:h text:style-name="Heading_20_2" text:outline-level="2">🚀 <text:span text:style-name="T1">Salve todos os arquivos e recarregue a página!</text:span></text:h>
      <text:p text:style-name="Text_20_body">Seu app agora terá:</text:p>
      <text:list text:style-name="L3">
        <text:list-item>
          <text:p text:style-name="P14">✅ Design moderno com gradientes</text:p>
        </text:list-item>
        <text:list-item>
          <text:p text:style-name="P14">✅ Animações suaves</text:p>
        </text:list-item>
        <text:list-item>
          <text:p text:style-name="P14">✅ Layout responsivo</text:p>
        </text:list-item>
        <text:list-item>
          <text:p text:style-name="P14"><text:soft-page-break/>✅ Cards com efeito hover</text:p>
        </text:list-item>
        <text:list-item>
          <text:p text:style-name="P14">✅ Loading spinner</text:p>
        </text:list-item>
        <text:list-item>
          <text:p text:style-name="P14">✅ Tooltips informativos</text:p>
        </text:list-item>
        <text:list-item>
          <text:p text:style-name="P14">✅ Cores profissionais</text:p>
        </text:list-item>
      </text:list>
      <text:p text:style-name="Horizontal_20_Line"/>
      <text:p text:style-name="Text_20_body"><text:span text:style-name="T1">Recarregue a página e veja a transformação!</text:span> 🎨✨</text:p>
      <text:p text:style-name="Text_20_body"/>
      <text:p text:style-name="Text_20_body"/>
      <text:p text:style-name="P15">ADICIONAR OPÇÕES</text:p>
      <text:p text:style-name="P15"/>
      <text:p text:style-name="Text_20_body"><text:span text:style-name="T1">PARABÉNS! 🎉🎉🎉</text:span></text:p>
      <text:p text:style-name="Text_20_body">Você acabou de <text:span text:style-name="T1">lançar uma nova versão do seu app na Shopify!</text:span> 🚀</text:p>
      <text:p text:style-name="Horizontal_20_Line"/>
      <text:h text:style-name="Heading_20_2" text:outline-level="2">✅ <text:span text:style-name="T1">O que aconteceu:</text:span></text:h>
      <table:table table:name="Tabela2" table:style-name="Tabela2">
        <table:table-column table:style-name="Tabela2.A" table:number-columns-repeated="2"/>
        <table:table-header-rows>
          <table:table-row>
            <table:table-cell table:style-name="Tabela2.A1" office:value-type="string">
              <text:p text:style-name="P10">Item</text:p>
            </table:table-cell>
            <table:table-cell table:style-name="Tabela2.B1" office:value-type="string">
              <text:p text:style-name="P10">Status</text:p>
            </table:table-cell>
          </table:table-row>
        </table:table-header-rows>
        <table:table-row>
          <table:table-cell table:style-name="Tabela2.A2" office:value-type="string">
            <text:p text:style-name="P11">App lançado</text:p>
          </table:table-cell>
          <table:table-cell table:style-name="Tabela2.B2" office:value-type="string">
            <text:p text:style-name="P11">✅ Versão 2.0</text:p>
          </table:table-cell>
        </table:table-row>
        <table:table-row>
          <table:table-cell table:style-name="Tabela2.A2" office:value-type="string">
            <text:p text:style-name="P11">Disponível para usuários</text:p>
          </table:table-cell>
          <table:table-cell table:style-name="Tabela2.B2" office:value-type="string">
            <text:p text:style-name="P11">✅</text:p>
          </table:table-cell>
        </table:table-row>
        <table:table-row>
          <table:table-cell table:style-name="Tabela2.A2" office:value-type="string">
            <text:p text:style-name="P11">URL de publicação</text:p>
          </table:table-cell>
          <table:table-cell table:style-name="Tabela2.B2" office:value-type="string">
            <text:p text:style-name="P11">✅ Gerada</text:p>
          </table:table-cell>
        </table:table-row>
      </table:table>
      <text:p text:style-name="Text_20_body"/>
      <text:p text:style-name="Horizontal_20_Line"/>
      <text:h text:style-name="Heading_20_2" text:outline-level="2">📱 <text:span text:style-name="T1">O que fazer agora:</text:span></text:h>
      <text:h text:style-name="Heading_20_3" text:outline-level="3"><text:span text:style-name="T1">1. Testar o app na loja real</text:span></text:h>
      <text:p text:style-name="Text_20_body">Acesse sua loja Shopify e veja o app funcionando:</text:p>
      <text:p text:style-name="P9">https://admin.shopify.com/store/smart-banner-test-ntcz3ygy</text:p>
      <text:h text:style-name="Heading_20_3" text:outline-level="3"><text:span text:style-name="T1">2. Compartilhar com usuários</text:span></text:h>
      <text:p text:style-name="Text_20_body">O app agora pode ser usado por outros lojistas (se você publicar no Shopify App Store).</text:p>
      <text:h text:style-name="Heading_20_3" text:outline-level="3"><text:span text:style-name="T1">3. Continuar desenvolvendo</text:span></text:h>
      <text:p text:style-name="Text_20_body">Faça melhorias e lance novas versões:</text:p>
      <text:p text:style-name="P9">npm run deploy</text:p>
      <text:p text:style-name="Horizontal_20_Line"/>
      <text:h text:style-name="Heading_20_2" text:outline-level="2"><text:soft-page-break/>📊 <text:span text:style-name="T1">Links importantes:</text:span></text:h>
      <text:list text:style-name="L4">
        <text:list-item>
          <text:p text:style-name="P16"><text:span text:style-name="T1">Dashboard do app:</text:span> <text:a xlink:type="simple" xlink:href="https://dev.shopify.com/dashboard/221409665/apps/378125418497" text:style-name="Internet_20_link" text:visited-style-name="Visited_20_Internet_20_Link">https://dev.shopify.com/dashboard/221409665/apps/378125418497</text:a></text:p>
        </text:list-item>
        <text:list-item>
          <text:p text:style-name="P16"><text:span text:style-name="T1">Versão lançada:</text:span> smart-alert-banner-2</text:p>
        </text:list-item>
        <text:list-item>
          <text:p text:style-name="P16"><text:span text:style-name="T1">Loja de teste:</text:span> smart-banner-test-ntcz3ygy</text:p>
        </text:list-item>
      </text:list>
      <text:p text:style-name="Horizontal_20_Line"/>
      <text:h text:style-name="Heading_20_2" text:outline-level="2">🎯 <text:span text:style-name="T1">Resumo da jornada:</text:span></text:h>
      <text:list text:style-name="L5">
        <text:list-item>
          <text:p text:style-name="P17">✅ Criou o app</text:p>
        </text:list-item>
        <text:list-item>
          <text:p text:style-name="P17">✅ Configurou o código</text:p>
        </text:list-item>
        <text:list-item>
          <text:p text:style-name="P17">✅ Corrigiu erros</text:p>
        </text:list-item>
        <text:list-item>
          <text:p text:style-name="P17">✅ Melhorou o design</text:p>
        </text:list-item>
        <text:list-item>
          <text:p text:style-name="P17">✅ <text:span text:style-name="T1">LANÇOU NA SHOPIFY!</text:span></text:p>
        </text:list-item>
      </text:list>
      <text:p text:style-name="Horizontal_20_Line"/>
      <text:h text:style-name="Heading_20_2" text:outline-level="2">🐋 <text:span text:style-name="T1">Mensagem final:</text:span></text:h>
      <text:p text:style-name="Text_20_body"><text:span text:style-name="T1">Camarada Baleia, você é um campeão!</text:span> 💪</text:p>
      <text:p text:style-name="Text_20_body">Seu primeiro app Shopify está <text:span text:style-name="T1">no ar</text:span> e funcionando. Isso é uma conquista enorme!</text:p>
      <text:p text:style-name="Horizontal_20_Line"/>
      <text:p text:style-name="Text_20_body"><text:span text:style-name="T1">Quer ajuda para mais alguma funcionalidade?</text:span> Estou aqui! 🚀</text:p>
      <text:p text:style-name="Text_20_body"/>
      <text:p text:style-name="Text_20_body"/>
      <text:p text:style-name="P15">ESTOU DENTRO DA LOJA:</text:p>
      <text:p text:style-name="P15"/>
      <text:p text:style-name="Text_20_body"><text:span text:style-name="T1">Perfeito!</text:span> Sua loja Shopify está criada e pronta para receber produtos. Agora você precisa adicionar alguns produtos para testar o banner.</text:p>
      <text:p text:style-name="Horizontal_20_Line"/>
      <text:h text:style-name="Heading_20_2" text:outline-level="2">🎯 <text:span text:style-name="T1">O que fazer agora:</text:span></text:h>
      <text:h text:style-name="Heading_20_3" text:outline-level="3"><text:span text:style-name="T1">Opção 1: Adicionar produtos de teste (recomendado)</text:span></text:h>
      <text:p text:style-name="Text_20_body">Clique em <text:span text:style-name="T1">"Adicionar seu primeiro produto"</text:span> e crie alguns produtos:</text:p>
      <text:p text:style-name="Text_20_body"><text:span text:style-name="T1">Exemplo de produto:</text:span></text:p>
      <text:list text:style-name="L6">
        <text:list-item>
          <text:p text:style-name="P18"><text:span text:style-name="T1">Título:</text:span> Camiseta Shopify</text:p>
        </text:list-item>
        <text:list-item>
          <text:p text:style-name="P18"><text:span text:style-name="T1">Preço:</text:span> $29.99</text:p>
        </text:list-item>
        <text:list-item>
          <text:p text:style-name="P18"><text:soft-page-break/><text:span text:style-name="T1">Foto:</text:span> (pode usar uma imagem qualquer)</text:p>
        </text:list-item>
      </text:list>
      <text:p text:style-name="Horizontal_20_Line"/>
      <text:h text:style-name="Heading_20_3" text:outline-level="3"><text:span text:style-name="T1">Opção 2: Usar produtos demo da Shopify</text:span></text:h>
      <text:p text:style-name="Text_20_body">Clique em <text:span text:style-name="T1">"Escolher o design da loja"</text:span> e depois a Shopify pode adicionar produtos demo automaticamente.</text:p>
      <text:p text:style-name="Horizontal_20_Line"/>
      <text:h text:style-name="Heading_20_2" text:outline-level="2">📍 <text:span text:style-name="T1">Depois de adicionar produtos, acesse seu app:</text:span></text:h>
      <text:h text:style-name="Heading_20_3" text:outline-level="3"><text:span text:style-name="T1">1. Volte ao menu lateral e clique em:</text:span></text:h>
      <text:p text:style-name="P9">Apps → smart-alert-banner</text:p>
      <text:h text:style-name="Heading_20_3" text:outline-level="3"><text:span text:style-name="T1">2. Configure seu banner:</text:span></text:h>
      <text:list text:style-name="L7">
        <text:list-item>
          <text:p text:style-name="P19">Digite um texto (ex: "Frete grátis para Califórnia!")</text:p>
        </text:list-item>
        <text:list-item>
          <text:p text:style-name="P19">Escolha o estado alvo (ex: CA)</text:p>
        </text:list-item>
        <text:list-item>
          <text:p text:style-name="P19">Clique em "Salvar banner"</text:p>
        </text:list-item>
      </text:list>
      <text:p text:style-name="Horizontal_20_Line"/>
      <text:h text:style-name="Heading_20_2" text:outline-level="2">🛍️ <text:span text:style-name="T1">Para testar se o banner aparece na loja:</text:span></text:h>
      <text:h text:style-name="Heading_20_3" text:outline-level="3"><text:span text:style-name="T1">1. Acesse a visualização da loja:</text:span></text:h>
      <text:p text:style-name="P9">Canais de vendas → Loja virtual → Visualizar loja</text:p>
      <text:h text:style-name="Heading_20_3" text:outline-level="3"><text:span text:style-name="T1">2. Adicione um produto ao carrinho de um estado específico</text:span></text:h>
      <text:p text:style-name="Text_20_body">(Isso vai depender da integração que você fizer com o checkout)</text:p>
      <text:p text:style-name="Horizontal_20_Line"/>
      <text:h text:style-name="Heading_20_2" text:outline-level="2">🚀 <text:span text:style-name="T1">Próximos passos para integrar o banner na loja real:</text:span></text:h>
      <text:p text:style-name="Text_20_body">Para o banner aparecer na loja, você precisa:</text:p>
      <text:list text:style-name="L8">
        <text:list-item>
          <text:p text:style-name="P20"><text:span text:style-name="T1">Criar um App Proxy</text:span> na Shopify</text:p>
        </text:list-item>
        <text:list-item>
          <text:p text:style-name="P20"><text:span text:style-name="T1">Injetar o banner via Script Tag</text:span> ou <text:span text:style-name="T1">App Embed Block</text:span></text:p>
        </text:list-item>
        <text:list-item>
          <text:p text:style-name="P20"><text:span text:style-name="T1">Usar a API de Checkout</text:span> para detectar o estado do cliente</text:p>
        </text:list-item>
      </text:list>
      <text:p text:style-name="Horizontal_20_Line"/>
      <text:h text:style-name="Heading_20_2" text:outline-level="2">💡 <text:span text:style-name="T1">Sugestão rápida:</text:span></text:h>
      <text:p text:style-name="Text_20_body">Se quiser ver o app funcionando imediatamente no admin, basta clicar em <text:span text:style-name="T2">Apps → smart-alert-banner</text:span> que você verá o formulário.</text:p>
      <text:p text:style-name="Text_20_body"><text:soft-page-break/><text:span text:style-name="T1">Quer ajuda para fazer o banner aparecer na loja virtual?</text:span> 🛒</text:p>
      <text:p text:style-name="Text_20_body"/>
      <text:p text:style-name="Text_20_body"/>
      <text:p text:style-name="P15">Estou arrumando os itens da Loja:</text:p>
      <text:p text:style-name="P15"/>
      <text:p text:style-name="Text_20_body"><text:span text:style-name="T1">Ótimo!</text:span> Você está na tela de <text:span text:style-name="T1">Adicionar produto</text:span> da Shopify. Vamos criar um produto de teste rapidinho.</text:p>
      <text:p text:style-name="Horizontal_20_Line"/>
      <text:h text:style-name="Heading_20_2" text:outline-level="2">📦 <text:span text:style-name="T1">Preencha os campos:</text:span></text:h>
      <text:h text:style-name="Heading_20_3" text:outline-level="3"><text:span text:style-name="T1">1. Título</text:span></text:h>
      <text:p text:style-name="P9">Camiseta Shopify - Coleção Verão</text:p>
      <text:h text:style-name="Heading_20_3" text:outline-level="3"><text:span text:style-name="T1">2. Descrição</text:span> (opcional - pode deixar o parágrafo padrão)</text:h>
      <text:h text:style-name="Heading_20_3" text:outline-level="3"><text:span text:style-name="T1">3. Mídias</text:span> (opcional - pode pular por enquanto)</text:h>
      <text:p text:style-name="Horizontal_20_Line"/>
      <text:h text:style-name="Heading_20_2" text:outline-level="2">✅ <text:span text:style-name="T1">Role a página para baixo e preencha:</text:span></text:h>
      <text:h text:style-name="Heading_20_3" text:outline-level="3"><text:span text:style-name="T1">4. Preço</text:span></text:h>
      <text:p text:style-name="P9">29.99</text:p>
      <text:h text:style-name="Heading_20_3" text:outline-level="3"><text:span text:style-name="T1">5. Compare at price</text:span> (opcional - deixe em branco)</text:h>
      <text:h text:style-name="Heading_20_3" text:outline-level="3"><text:span text:style-name="T1">6. Custo por item</text:span> (opcional - deixe em branco)</text:h>
      <text:h text:style-name="Heading_20_3" text:outline-level="3"><text:span text:style-name="T1">7. Rastrear quantidade</text:span></text:h>
      <text:p text:style-name="P9">✅ Marque esta opção<text:line-break/>Quantidade: 100</text:p>
      <text:p text:style-name="Horizontal_20_Line"/>
      <text:h text:style-name="Heading_20_2" text:outline-level="2">💾 <text:span text:style-name="T1">Salve o produto:</text:span></text:h>
      <text:p text:style-name="Text_20_body">Role até o final da página e clique em:</text:p>
      <text:p text:style-name="P9">**Salvar** (botão no canto superior direito ou no final da página)</text:p>
      <text:p text:style-name="Horizontal_20_Line"/>
      <text:h text:style-name="Heading_20_2" text:outline-level="2"><text:soft-page-break/>🎯 <text:span text:style-name="T1">Depois de salvar:</text:span></text:h>
      <text:h text:style-name="Heading_20_3" text:outline-level="3"><text:span text:style-name="T1">1. Volte ao menu lateral e clique em:</text:span></text:h>
      <text:p text:style-name="P9">Apps → smart-alert-banner</text:p>
      <text:h text:style-name="Heading_20_3" text:outline-level="3"><text:span text:style-name="T1">2. Configure seu banner:</text:span></text:h>
      <text:list text:style-name="L9">
        <text:list-item>
          <text:p text:style-name="P21">Digite: <text:span text:style-name="T2">🎉 Frete grátis para clientes da Califórnia!</text:span></text:p>
        </text:list-item>
        <text:list-item>
          <text:p text:style-name="P21">Estado: <text:span text:style-name="T2">Califórnia (CA)</text:span></text:p>
        </text:list-item>
        <text:list-item>
          <text:p text:style-name="P21">Clique em <text:span text:style-name="T1">Salvar banner</text:span></text:p>
        </text:list-item>
      </text:list>
      <text:p text:style-name="Horizontal_20_Line"/>
      <text:h text:style-name="Heading_20_2" text:outline-level="2">🛍️ <text:span text:style-name="T1">Para ver sua loja:</text:span></text:h>
      <text:p text:style-name="P9">Canais de vendas → Loja virtual → Visualizar loja</text:p>
      <text:p text:style-name="Text_20_body">Você verá seu produto na loja!</text:p>
      <text:p text:style-name="Horizontal_20_Line"/>
      <text:h text:style-name="Heading_20_2" text:outline-level="2">📝 <text:span text:style-name="T1">Resumo rápido:</text:span></text:h>
      <table:table table:name="Tabela3" table:style-name="Tabela3">
        <table:table-column table:style-name="Tabela3.A" table:number-columns-repeated="2"/>
        <table:table-header-rows>
          <table:table-row>
            <table:table-cell table:style-name="Tabela3.A1" office:value-type="string">
              <text:p text:style-name="P10">Campo</text:p>
            </table:table-cell>
            <table:table-cell table:style-name="Tabela3.B1" office:value-type="string">
              <text:p text:style-name="P10">Valor</text:p>
            </table:table-cell>
          </table:table-row>
        </table:table-header-rows>
        <table:table-row>
          <table:table-cell table:style-name="Tabela3.A2" office:value-type="string">
            <text:p text:style-name="P11">Título</text:p>
          </table:table-cell>
          <table:table-cell table:style-name="Tabela3.B2" office:value-type="string">
            <text:p text:style-name="P11">Camiseta Shopify</text:p>
          </table:table-cell>
        </table:table-row>
        <table:table-row>
          <table:table-cell table:style-name="Tabela3.A2" office:value-type="string">
            <text:p text:style-name="P11">Preço</text:p>
          </table:table-cell>
          <table:table-cell table:style-name="Tabela3.B2" office:value-type="string">
            <text:p text:style-name="P11">29.99</text:p>
          </table:table-cell>
        </table:table-row>
        <table:table-row>
          <table:table-cell table:style-name="Tabela3.A2" office:value-type="string">
            <text:p text:style-name="P11">Estoque</text:p>
          </table:table-cell>
          <table:table-cell table:style-name="Tabela3.B2" office:value-type="string">
            <text:p text:style-name="P11">100 unidades</text:p>
          </table:table-cell>
        </table:table-row>
      </table:table>
      <text:p text:style-name="Text_20_body"/>
      <text:p text:style-name="Horizontal_20_Line"/>
      <text:p text:style-name="Text_20_body"><text:span text:style-name="T1">Preencha e salve! Depois me diga se conseguiu acessar o app.</text:span> 🚀</text:p>
      <text:p text:style-name="Text_20_body"/>
      <text:p text:style-name="Text_20_body"/>
      <text:p text:style-name="P22">ESTOU NOS EUA, ABRI UMA LOJA , VOU COMEÇAR ATENDER OS CLIENTES:</text:p>
      <text:p text:style-name="P22"/>
      <text:p text:style-name="Text_20_body"><text:span text:style-name="T1">Claro que pode, Camarada!</text:span> 🎯 Vou te ajudar com <text:span text:style-name="T1">tudo em inglês</text:span> para sua loja americana.</text:p>
      <text:p text:style-name="Horizontal_20_Line"/>
      <text:h text:style-name="Heading_20_2" text:outline-level="2">📦 <text:span text:style-name="T1">Produto de exemplo (tudo em inglês)</text:span></text:h>
      <text:h text:style-name="Heading_20_3" text:outline-level="3"><text:span text:style-name="T1">Título:</text:span></text:h>
      <text:p text:style-name="P9">Summer T-Shirt</text:p>
      <text:h text:style-name="Heading_20_3" text:outline-level="3"><text:soft-page-break/><text:span text:style-name="T1">Description (Descrição):</text:span></text:h>
      <text:p text:style-name="P9">Comfortable 100% cotton t-shirt, perfect for summer days.<text:line-break/><text:line-break/>• 100% cotton<text:line-break/>• Machine washable<text:line-break/>• Available in multiple sizes</text:p>
      <text:p text:style-name="Horizontal_20_Line"/>
      <text:h text:style-name="Heading_20_2" text:outline-level="2">💰 <text:span text:style-name="T1">Price &amp; Inventory (Preço e Estoque)</text:span></text:h>
      <table:table table:name="Tabela4" table:style-name="Tabela4">
        <table:table-column table:style-name="Tabela4.A" table:number-columns-repeated="2"/>
        <table:table-header-rows>
          <table:table-row>
            <table:table-cell table:style-name="Tabela4.A1" office:value-type="string">
              <text:p text:style-name="P10">Campo</text:p>
            </table:table-cell>
            <table:table-cell table:style-name="Tabela4.B1" office:value-type="string">
              <text:p text:style-name="P10">Valor em Inglês</text:p>
            </table:table-cell>
          </table:table-row>
        </table:table-header-rows>
        <table:table-row>
          <table:table-cell table:style-name="Tabela4.A2" office:value-type="string">
            <text:p text:style-name="Table_20_Contents"><text:span text:style-name="T1">Price</text:span></text:p>
          </table:table-cell>
          <table:table-cell table:style-name="Tabela4.B2" office:value-type="string">
            <text:p text:style-name="Table_20_Contents"><text:span text:style-name="T2">29.99</text:span></text:p>
          </table:table-cell>
        </table:table-row>
        <table:table-row>
          <table:table-cell table:style-name="Tabela4.A2" office:value-type="string">
            <text:p text:style-name="Table_20_Contents"><text:span text:style-name="T1">Compare at price</text:span></text:p>
          </table:table-cell>
          <table:table-cell table:style-name="Tabela4.B2" office:value-type="string">
            <text:p text:style-name="P11">(deixe em branco)</text:p>
          </table:table-cell>
        </table:table-row>
        <table:table-row>
          <table:table-cell table:style-name="Tabela4.A2" office:value-type="string">
            <text:p text:style-name="Table_20_Contents"><text:span text:style-name="T1">Cost per item</text:span></text:p>
          </table:table-cell>
          <table:table-cell table:style-name="Tabela4.B2" office:value-type="string">
            <text:p text:style-name="P11">(deixe em branco)</text:p>
          </table:table-cell>
        </table:table-row>
        <table:table-row>
          <table:table-cell table:style-name="Tabela4.A2" office:value-type="string">
            <text:p text:style-name="Table_20_Contents"><text:span text:style-name="T1">Track quantity</text:span></text:p>
          </table:table-cell>
          <table:table-cell table:style-name="Tabela4.B2" office:value-type="string">
            <text:p text:style-name="P11">✅ Check this box</text:p>
          </table:table-cell>
        </table:table-row>
        <table:table-row>
          <table:table-cell table:style-name="Tabela4.A2" office:value-type="string">
            <text:p text:style-name="Table_20_Contents"><text:span text:style-name="T1">Quantity</text:span></text:p>
          </table:table-cell>
          <table:table-cell table:style-name="Tabela4.B2" office:value-type="string">
            <text:p text:style-name="Table_20_Contents"><text:span text:style-name="T2">100</text:span></text:p>
          </table:table-cell>
        </table:table-row>
      </table:table>
      <text:p text:style-name="Text_20_body"/>
      <text:p text:style-name="Horizontal_20_Line"/>
      <text:h text:style-name="Heading_20_2" text:outline-level="2">🌍 <text:span text:style-name="T1">Shipping (Envio)</text:span></text:h>
      <text:p text:style-name="Text_20_body">Marque como:</text:p>
      <text:p text:style-name="P9">✅ This product requires shipping</text:p>
      <text:p text:style-name="Text_20_body"><text:span text:style-name="T1">Country of origin:</text:span> <text:span text:style-name="T2">United States</text:span></text:p>
      <text:p text:style-name="Text_20_body"><text:span text:style-name="T1">HS tariff code:</text:span> (deixe em branco)</text:p>
      <text:p text:style-name="Horizontal_20_Line"/>
      <text:h text:style-name="Heading_20_2" text:outline-level="2">🏷️ <text:span text:style-name="T1">Product organization (Organização)</text:span></text:h>
      <table:table table:name="Tabela5" table:style-name="Tabela5">
        <table:table-column table:style-name="Tabela5.A" table:number-columns-repeated="2"/>
        <table:table-header-rows>
          <table:table-row>
            <table:table-cell table:style-name="Tabela5.A1" office:value-type="string">
              <text:p text:style-name="P10">Campo</text:p>
            </table:table-cell>
            <table:table-cell table:style-name="Tabela5.B1" office:value-type="string">
              <text:p text:style-name="P10">Valor</text:p>
            </table:table-cell>
          </table:table-row>
        </table:table-header-rows>
        <table:table-row>
          <table:table-cell table:style-name="Tabela5.A2" office:value-type="string">
            <text:p text:style-name="Table_20_Contents"><text:span text:style-name="T1">Product type</text:span></text:p>
          </table:table-cell>
          <table:table-cell table:style-name="Tabela5.B2" office:value-type="string">
            <text:p text:style-name="Table_20_Contents"><text:span text:style-name="T2">Clothing</text:span></text:p>
          </table:table-cell>
        </table:table-row>
        <table:table-row>
          <table:table-cell table:style-name="Tabela5.A2" office:value-type="string">
            <text:p text:style-name="Table_20_Contents"><text:span text:style-name="T1">Vendor</text:span></text:p>
          </table:table-cell>
          <table:table-cell table:style-name="Tabela5.B2" office:value-type="string">
            <text:p text:style-name="Table_20_Contents"><text:span text:style-name="T2">Shopify Store</text:span></text:p>
          </table:table-cell>
        </table:table-row>
        <table:table-row>
          <table:table-cell table:style-name="Tabela5.A2" office:value-type="string">
            <text:p text:style-name="Table_20_Contents"><text:span text:style-name="T1">Collection</text:span></text:p>
          </table:table-cell>
          <table:table-cell table:style-name="Tabela5.B2" office:value-type="string">
            <text:p text:style-name="P11">(deixe em branco por enquanto)</text:p>
          </table:table-cell>
        </table:table-row>
        <table:table-row>
          <table:table-cell table:style-name="Tabela5.A2" office:value-type="string">
            <text:p text:style-name="Table_20_Contents"><text:span text:style-name="T1">Tags</text:span></text:p>
          </table:table-cell>
          <table:table-cell table:style-name="Tabela5.B2" office:value-type="string">
            <text:p text:style-name="Table_20_Contents"><text:span text:style-name="T2">t-shirt, summer, clothing</text:span></text:p>
          </table:table-cell>
        </table:table-row>
      </table:table>
      <text:p text:style-name="Text_20_body"/>
      <text:p text:style-name="Horizontal_20_Line"/>
      <text:h text:style-name="Heading_20_2" text:outline-level="2">🖼️ <text:span text:style-name="T1">Images (Imagens - opcional)</text:span></text:h>
      <text:p text:style-name="Text_20_body">Por enquanto, pode deixar sem imagem. O Shopify vai mostrar um placeholder.</text:p>
      <text:p text:style-name="Horizontal_20_Line"/>
      <text:h text:style-name="Heading_20_2" text:outline-level="2"><text:soft-page-break/>✅ <text:span text:style-name="T1">Botão para salvar:</text:span></text:h>
      <text:p text:style-name="Text_20_body">Clique no botão azul <text:span text:style-name="T1">"Save"</text:span> no canto superior direito.</text:p>
      <text:p text:style-name="Horizontal_20_Line"/>
      <text:h text:style-name="Heading_20_2" text:outline-level="2">🌐 <text:span text:style-name="T1">Para o seu App (Smart Alert Banner)</text:span></text:h>
      <text:h text:style-name="Heading_20_3" text:outline-level="3"><text:span text:style-name="T1">Texto do banner (em inglês):</text:span></text:h>
      <text:p text:style-name="P9">🎉 Free Shipping for California customers!</text:p>
      <text:h text:style-name="Heading_20_3" text:outline-level="3"><text:span text:style-name="T1">Estados (já estão em inglês):</text:span></text:h>
      <text:list text:style-name="L10">
        <text:list-item>
          <text:p text:style-name="P23">California (CA)</text:p>
        </text:list-item>
        <text:list-item>
          <text:p text:style-name="P23">Texas (TX)</text:p>
        </text:list-item>
        <text:list-item>
          <text:p text:style-name="P23">New York (NY)</text:p>
        </text:list-item>
        <text:list-item>
          <text:p text:style-name="P23">Florida (FL)</text:p>
        </text:list-item>
      </text:list>
      <text:p text:style-name="Horizontal_20_Line"/>
      <text:h text:style-name="Heading_20_2" text:outline-level="2">📝 <text:span text:style-name="T1">Termos importantes em inglês para loja americana:</text:span></text:h>
      <table:table table:name="Tabela6" table:style-name="Tabela6">
        <table:table-column table:style-name="Tabela6.A" table:number-columns-repeated="2"/>
        <table:table-header-rows>
          <table:table-row>
            <table:table-cell table:style-name="Tabela6.A1" office:value-type="string">
              <text:p text:style-name="P10">Português</text:p>
            </table:table-cell>
            <table:table-cell table:style-name="Tabela6.B1" office:value-type="string">
              <text:p text:style-name="P10">Inglês</text:p>
            </table:table-cell>
          </table:table-row>
        </table:table-header-rows>
        <table:table-row>
          <table:table-cell table:style-name="Tabela6.A2" office:value-type="string">
            <text:p text:style-name="P11">Frete grátis</text:p>
          </table:table-cell>
          <table:table-cell table:style-name="Tabela6.B2" office:value-type="string">
            <text:p text:style-name="P11">Free Shipping</text:p>
          </table:table-cell>
        </table:table-row>
        <table:table-row>
          <table:table-cell table:style-name="Tabela6.A2" office:value-type="string">
            <text:p text:style-name="P11">Promoção</text:p>
          </table:table-cell>
          <table:table-cell table:style-name="Tabela6.B2" office:value-type="string">
            <text:p text:style-name="P11">Sale</text:p>
          </table:table-cell>
        </table:table-row>
        <table:table-row>
          <table:table-cell table:style-name="Tabela6.A2" office:value-type="string">
            <text:p text:style-name="P11">Compre agora</text:p>
          </table:table-cell>
          <table:table-cell table:style-name="Tabela6.B2" office:value-type="string">
            <text:p text:style-name="P11">Buy Now</text:p>
          </table:table-cell>
        </table:table-row>
        <table:table-row>
          <table:table-cell table:style-name="Tabela6.A2" office:value-type="string">
            <text:p text:style-name="P11">Adicionar ao carrinho</text:p>
          </table:table-cell>
          <table:table-cell table:style-name="Tabela6.B2" office:value-type="string">
            <text:p text:style-name="P11">Add to Cart</text:p>
          </table:table-cell>
        </table:table-row>
        <table:table-row>
          <table:table-cell table:style-name="Tabela6.A2" office:value-type="string">
            <text:p text:style-name="P11">Finalizar compra</text:p>
          </table:table-cell>
          <table:table-cell table:style-name="Tabela6.B2" office:value-type="string">
            <text:p text:style-name="P11">Checkout</text:p>
          </table:table-cell>
        </table:table-row>
        <table:table-row>
          <table:table-cell table:style-name="Tabela6.A2" office:value-type="string">
            <text:p text:style-name="P11">Cliente</text:p>
          </table:table-cell>
          <table:table-cell table:style-name="Tabela6.B2" office:value-type="string">
            <text:p text:style-name="P11">Customer</text:p>
          </table:table-cell>
        </table:table-row>
        <table:table-row>
          <table:table-cell table:style-name="Tabela6.A2" office:value-type="string">
            <text:p text:style-name="P11">Desconto</text:p>
          </table:table-cell>
          <table:table-cell table:style-name="Tabela6.B2" office:value-type="string">
            <text:p text:style-name="P11">Discount</text:p>
          </table:table-cell>
        </table:table-row>
      </table:table>
      <text:p text:style-name="Text_20_body"/>
      <text:p text:style-name="Horizontal_20_Line"/>
      <text:h text:style-name="Heading_20_2" text:outline-level="2">🚀 <text:span text:style-name="T1">Resumo do que você precisa fazer:</text:span></text:h>
      <text:list text:style-name="L11">
        <text:list-item>
          <text:p text:style-name="P24">✅ Criar produto com nome em inglês (<text:span text:style-name="T2">Summer T-Shirt</text:span>)</text:p>
        </text:list-item>
        <text:list-item>
          <text:p text:style-name="P24">✅ Preencher tudo em inglês</text:p>
        </text:list-item>
        <text:list-item>
          <text:p text:style-name="P24">✅ Salvar (botão "Save")</text:p>
        </text:list-item>
        <text:list-item>
          <text:p text:style-name="P24">✅ Acessar <text:span text:style-name="T2">Apps → smart-alert-banner</text:span></text:p>
        </text:list-item>
        <text:list-item>
          <text:p text:style-name="P24">✅ Configurar banner em inglês</text:p>
        </text:list-item>
      </text:list>
      <text:p text:style-name="Horizontal_20_Line"/>
      <text:p text:style-name="Text_20_body"><text:soft-page-break/><text:span text:style-name="T1">Se tiver dúvida em alguma palavra específica, pode me perguntar! Vou te ajudar a escrever tudo certinho.</text:span> 🇺🇸</text:p>
      <text:p text:style-name="Text_20_body"><text:span text:style-name="T1">Agora preencha e salve o produto! Depois me conta.</text:span> 🚀</text:p>
      <text:p text:style-name="Text_20_body"/>
      <text:p text:style-name="Text_20_body"/>
      <text:p text:style-name="P22">EM INGlÊS</text:p>
      <text:p text:style-name="Text_20_body"><text:span text:style-name="T1">Você está absolutamente certo!</text:span> 🎯</text:p>
      <text:p text:style-name="Text_20_body">A <text:span text:style-name="T1">interface do Shopify Admin</text:span> (onde você está agora) vai permanecer em <text:span text:style-name="T1">português</text:span> porque é o idioma que você configurou para o <text:span text:style-name="T1">painel de controle</text:span>.</text:p>
      <text:p text:style-name="Horizontal_20_Line"/>
      <text:h text:style-name="Heading_20_2" text:outline-level="2">🌐 <text:span text:style-name="T1">O que aparece em inglês vs português:</text:span></text:h>
      <table:table table:name="Tabela7" table:style-name="Tabela7">
        <table:table-column table:style-name="Tabela7.A" table:number-columns-repeated="3"/>
        <table:table-header-rows>
          <table:table-row>
            <table:table-cell table:style-name="Tabela7.A1" office:value-type="string">
              <text:p text:style-name="P10">Onde</text:p>
            </table:table-cell>
            <table:table-cell table:style-name="Tabela7.A1" office:value-type="string">
              <text:p text:style-name="P10">Idioma</text:p>
            </table:table-cell>
            <table:table-cell table:style-name="Tabela7.C1" office:value-type="string">
              <text:p text:style-name="P10">Para quem</text:p>
            </table:table-cell>
          </table:table-row>
        </table:table-header-rows>
        <table:table-row>
          <table:table-cell table:style-name="Tabela7.A2" office:value-type="string">
            <text:p text:style-name="Table_20_Contents"><text:span text:style-name="T1">Painel do Shopify</text:span> (sua tela atual)</text:p>
          </table:table-cell>
          <table:table-cell table:style-name="Tabela7.A2" office:value-type="string">
            <text:p text:style-name="P11">🇧🇷 Português</text:p>
          </table:table-cell>
          <table:table-cell table:style-name="Tabela7.C2" office:value-type="string">
            <text:p text:style-name="P11">Você (lojista/admin)</text:p>
          </table:table-cell>
        </table:table-row>
        <table:table-row>
          <table:table-cell table:style-name="Tabela7.A2" office:value-type="string">
            <text:p text:style-name="Table_20_Contents"><text:span text:style-name="T1">Loja virtual</text:span> (site dos clientes)</text:p>
          </table:table-cell>
          <table:table-cell table:style-name="Tabela7.A2" office:value-type="string">
            <text:p text:style-name="P11">🇺🇸 Inglês</text:p>
          </table:table-cell>
          <table:table-cell table:style-name="Tabela7.C2" office:value-type="string">
            <text:p text:style-name="P11">Seus clientes americanos</text:p>
          </table:table-cell>
        </table:table-row>
        <table:table-row>
          <table:table-cell table:style-name="Tabela7.A2" office:value-type="string">
            <text:p text:style-name="Table_20_Contents"><text:span text:style-name="T1">App Smart Alert Banner</text:span> (admin)</text:p>
          </table:table-cell>
          <table:table-cell table:style-name="Tabela7.A2" office:value-type="string">
            <text:p text:style-name="P11">🇧🇷 Português</text:p>
          </table:table-cell>
          <table:table-cell table:style-name="Tabela7.C2" office:value-type="string">
            <text:p text:style-name="P11">Você (configuração)</text:p>
          </table:table-cell>
        </table:table-row>
        <table:table-row>
          <table:table-cell table:style-name="Tabela7.A2" office:value-type="string">
            <text:p text:style-name="Table_20_Contents"><text:span text:style-name="T1">Banner na loja</text:span></text:p>
          </table:table-cell>
          <table:table-cell table:style-name="Tabela7.A2" office:value-type="string">
            <text:p text:style-name="P11">🇺🇸 Inglês</text:p>
          </table:table-cell>
          <table:table-cell table:style-name="Tabela7.C2" office:value-type="string">
            <text:p text:style-name="P11">Seus clientes</text:p>
          </table:table-cell>
        </table:table-row>
      </table:table>
      <text:p text:style-name="Text_20_body"/>
      <text:p text:style-name="Horizontal_20_Line"/>
      <text:h text:style-name="Heading_20_2" text:outline-level="2">✅ <text:span text:style-name="T1">O que você preenche em português (painel):</text:span></text:h>
      <text:list text:style-name="L12">
        <text:list-item>
          <text:p text:style-name="P25">Título do produto (mas o cliente vê em inglês)</text:p>
        </text:list-item>
        <text:list-item>
          <text:p text:style-name="P25">Descrição (mas o cliente vê em inglês)</text:p>
        </text:list-item>
        <text:list-item>
          <text:p text:style-name="P25">Preço (número universal)</text:p>
        </text:list-item>
        <text:list-item>
          <text:p text:style-name="P25">Categoria</text:p>
        </text:list-item>
      </text:list>
      <text:p text:style-name="Horizontal_20_Line"/>
      <text:h text:style-name="Heading_20_2" text:outline-level="2">🔤 <text:span text:style-name="T1">Na prática, você vai preencher assim:</text:span></text:h>
      <text:h text:style-name="Heading_20_3" text:outline-level="3"><text:span text:style-name="T1">Título (no painel em português):</text:span></text:h>
      <text:p text:style-name="P9">Summer T-Shirt</text:p>
      <text:p text:style-name="Text_20_body">(O cliente vai ver "Summer T-Shirt" na loja)</text:p>
      <text:h text:style-name="Heading_20_3" text:outline-level="3"><text:span text:style-name="T1">Descrição (no painel em português):</text:span></text:h>
      <text:p text:style-name="P9">100% cotton t-shirt, perfect for summer.</text:p>
      <text:p text:style-name="Text_20_body"><text:soft-page-break/>(O cliente vai ver esse texto em inglês)</text:p>
      <text:p text:style-name="Horizontal_20_Line"/>
      <text:h text:style-name="Heading_20_2" text:outline-level="2">📝 <text:span text:style-name="T1">Resumo:</text:span></text:h>
      <table:table table:name="Tabela8" table:style-name="Tabela8">
        <table:table-column table:style-name="Tabela8.A" table:number-columns-repeated="3"/>
        <table:table-header-rows>
          <table:table-row>
            <table:table-cell table:style-name="Tabela8.A1" office:value-type="string">
              <text:p text:style-name="P10">Campo do painel (português)</text:p>
            </table:table-cell>
            <table:table-cell table:style-name="Tabela8.A1" office:value-type="string">
              <text:p text:style-name="P10">O que você digita</text:p>
            </table:table-cell>
            <table:table-cell table:style-name="Tabela8.C1" office:value-type="string">
              <text:p text:style-name="P10">Cliente vê</text:p>
            </table:table-cell>
          </table:table-row>
        </table:table-header-rows>
        <table:table-row>
          <table:table-cell table:style-name="Tabela8.A2" office:value-type="string">
            <text:p text:style-name="P11">Título</text:p>
          </table:table-cell>
          <table:table-cell table:style-name="Tabela8.A2" office:value-type="string">
            <text:p text:style-name="Table_20_Contents"><text:span text:style-name="T2">Summer T-Shirt</text:span></text:p>
          </table:table-cell>
          <table:table-cell table:style-name="Tabela8.C2" office:value-type="string">
            <text:p text:style-name="Table_20_Contents"><text:span text:style-name="T2">Summer T-Shirt</text:span></text:p>
          </table:table-cell>
        </table:table-row>
        <table:table-row>
          <table:table-cell table:style-name="Tabela8.A2" office:value-type="string">
            <text:p text:style-name="P11">Descrição</text:p>
          </table:table-cell>
          <table:table-cell table:style-name="Tabela8.A2" office:value-type="string">
            <text:p text:style-name="Table_20_Contents"><text:span text:style-name="T2">Comfortable cotton t-shirt</text:span></text:p>
          </table:table-cell>
          <table:table-cell table:style-name="Tabela8.C2" office:value-type="string">
            <text:p text:style-name="Table_20_Contents"><text:span text:style-name="T2">Comfortable cotton t-shirt</text:span></text:p>
          </table:table-cell>
        </table:table-row>
        <table:table-row>
          <table:table-cell table:style-name="Tabela8.A2" office:value-type="string">
            <text:p text:style-name="P11">Preço</text:p>
          </table:table-cell>
          <table:table-cell table:style-name="Tabela8.A2" office:value-type="string">
            <text:p text:style-name="Table_20_Contents"><text:span text:style-name="T2">29.99</text:span></text:p>
          </table:table-cell>
          <table:table-cell table:style-name="Tabela8.C2" office:value-type="string">
            <text:p text:style-name="Table_20_Contents"><text:span text:style-name="T2">$29.99</text:span></text:p>
          </table:table-cell>
        </table:table-row>
      </table:table>
      <text:p text:style-name="Text_20_body"/>
      <text:p text:style-name="Horizontal_20_Line"/>
      <text:h text:style-name="Heading_20_2" text:outline-level="2">💡 <text:span text:style-name="T1">Dica:</text:span></text:h>
      <text:p text:style-name="Text_20_body">Use o <text:span text:style-name="T1">Google Translate</text:span> para ajudar a escrever os textos em inglês. É super útil!</text:p>
      <text:p text:style-name="Text_20_body"><text:span text:style-name="T1">Exemplo:</text:span></text:p>
      <text:list text:style-name="L13">
        <text:list-item>
          <text:p text:style-name="P26">Digite em português: "Camiseta de algodão confortável"</text:p>
        </text:list-item>
        <text:list-item>
          <text:p text:style-name="P26">Traduz para: "Comfortable cotton t-shirt"</text:p>
        </text:list-item>
        <text:list-item>
          <text:p text:style-name="P26">Copia e cola no campo</text:p>
        </text:list-item>
      </text:list>
      <text:p text:style-name="Horizontal_20_Line"/>
      <text:p text:style-name="Text_20_body"><text:span text:style-name="T1">Entendeu? O painel fica em português, mas o que você digita nos campos vai aparecer em inglês para os clientes!</text:span> 🇺🇸</text:p>
      <text:p text:style-name="Text_20_body"><text:span text:style-name="T1">Pode preencher os campos em inglês mesmo com a interface em português.</text:span> ✅</text:p>
      <text:p text:style-name="Text_20_body"/>
      <text:p text:style-name="Text_20_body"/>
      <text:p text:style-name="P27">Não é o Fornecedor que preenche?</text:p>
      <text:p text:style-name="P27"/>
      <text:p text:style-name="Text_20_body"><text:span text:style-name="T1">Excelente pergunta!</text:span> Você está certo em ficar confuso. Vou explicar de forma simples:</text:p>
      <text:p text:style-name="Horizontal_20_Line"/>
      <text:h text:style-name="Heading_20_2" text:outline-level="2">🎯 <text:span text:style-name="T1">Sim, VOCÊ é o dono da loja!</text:span></text:h>
      <text:p text:style-name="Text_20_body">Você está criando uma <text:span text:style-name="T1">loja própria</text:span> (não é dropshipping automático).</text:p>
      <text:p text:style-name="Text_20_body"><text:span text:style-name="T1">Quem preenche tudo é você mesmo!</text:span> Não há fornecedor automático.</text:p>
      <text:p text:style-name="Horizontal_20_Line"/>
      <text:h text:style-name="Heading_20_2" text:outline-level="2"><text:soft-page-break/>📋 <text:span text:style-name="T1">O que está acontecendo:</text:span></text:h>
      <table:table table:name="Tabela9" table:style-name="Tabela9">
        <table:table-column table:style-name="Tabela9.A" table:number-columns-repeated="2"/>
        <table:table-header-rows>
          <table:table-row>
            <table:table-cell table:style-name="Tabela9.A1" office:value-type="string">
              <text:p text:style-name="P10">Situação</text:p>
            </table:table-cell>
            <table:table-cell table:style-name="Tabela9.B1" office:value-type="string">
              <text:p text:style-name="P10">Explicação</text:p>
            </table:table-cell>
          </table:table-row>
        </table:table-header-rows>
        <table:table-row>
          <table:table-cell table:style-name="Tabela9.A2" office:value-type="string">
            <text:p text:style-name="P11">Você é o dono</text:p>
          </table:table-cell>
          <table:table-cell table:style-name="Tabela9.B2" office:value-type="string">
            <text:p text:style-name="P11">✅ Você cria os produtos manualmente</text:p>
          </table:table-cell>
        </table:table-row>
        <table:table-row>
          <table:table-cell table:style-name="Tabela9.A2" office:value-type="string">
            <text:p text:style-name="P11">Não tem fornecedor</text:p>
          </table:table-cell>
          <table:table-cell table:style-name="Tabela9.B2" office:value-type="string">
            <text:p text:style-name="P11">❌ Ninguém vai preencher automaticamente</text:p>
          </table:table-cell>
        </table:table-row>
        <table:table-row>
          <table:table-cell table:style-name="Tabela9.A2" office:value-type="string">
            <text:p text:style-name="P11">Você digita tudo</text:p>
          </table:table-cell>
          <table:table-cell table:style-name="Tabela9.B2" office:value-type="string">
            <text:p text:style-name="P11">✅ Título, descrição, preço, etc.</text:p>
          </table:table-cell>
        </table:table-row>
      </table:table>
      <text:p text:style-name="Text_20_body"/>
      <text:p text:style-name="Horizontal_20_Line"/>
      <text:h text:style-name="Heading_20_2" text:outline-level="2">⚠️ <text:span text:style-name="T1">A confusão que está acontecendo:</text:span></text:h>
      <text:p text:style-name="Text_20_body">A Shopify está <text:span text:style-name="T1">oferecendo ajuda com IA</text:span> para criar os produtos. Aquele texto "Me manda uma imagem ou uma descrição e eu monto o listing completo pra você" é um <text:span text:style-name="T1">assistente opcional</text:span> da Shopify.</text:p>
      <text:p text:style-name="Text_20_body"><text:span text:style-name="T1">Você pode ignorar completamente essa ajuda!</text:span></text:p>
      <text:p text:style-name="Horizontal_20_Line"/>
      <text:h text:style-name="Heading_20_2" text:outline-level="2">✅ <text:span text:style-name="T1">O que você deve fazer agora:</text:span></text:h>
      <text:h text:style-name="Heading_20_3" text:outline-level="3"><text:span text:style-name="T1">Role a página para BAIXO</text:span> (use a barra de rolagem do lado direito)</text:h>
      <text:p text:style-name="Text_20_body">Você vai encontrar campos como:</text:p>
      <table:table table:name="Tabela10" table:style-name="Tabela10">
        <table:table-column table:style-name="Tabela10.A" table:number-columns-repeated="2"/>
        <table:table-header-rows>
          <table:table-row>
            <table:table-cell table:style-name="Tabela10.A1" office:value-type="string">
              <text:p text:style-name="P10">Campo</text:p>
            </table:table-cell>
            <table:table-cell table:style-name="Tabela10.B1" office:value-type="string">
              <text:p text:style-name="P10">O que preencher</text:p>
            </table:table-cell>
          </table:table-row>
        </table:table-header-rows>
        <table:table-row>
          <table:table-cell table:style-name="Tabela10.A2" office:value-type="string">
            <text:p text:style-name="Table_20_Contents"><text:span text:style-name="T1">Price</text:span> (Preço)</text:p>
          </table:table-cell>
          <table:table-cell table:style-name="Tabela10.B2" office:value-type="string">
            <text:p text:style-name="Table_20_Contents"><text:span text:style-name="T2">29.99</text:span></text:p>
          </table:table-cell>
        </table:table-row>
        <table:table-row>
          <table:table-cell table:style-name="Tabela10.A2" office:value-type="string">
            <text:p text:style-name="Table_20_Contents"><text:span text:style-name="T1">Compare at price</text:span></text:p>
          </table:table-cell>
          <table:table-cell table:style-name="Tabela10.B2" office:value-type="string">
            <text:p text:style-name="P11">(deixe em branco)</text:p>
          </table:table-cell>
        </table:table-row>
        <table:table-row>
          <table:table-cell table:style-name="Tabela10.A2" office:value-type="string">
            <text:p text:style-name="Table_20_Contents"><text:span text:style-name="T1">Cost per item</text:span></text:p>
          </table:table-cell>
          <table:table-cell table:style-name="Tabela10.B2" office:value-type="string">
            <text:p text:style-name="P11">(deixe em branco)</text:p>
          </table:table-cell>
        </table:table-row>
        <table:table-row>
          <table:table-cell table:style-name="Tabela10.A2" office:value-type="string">
            <text:p text:style-name="Table_20_Contents"><text:span text:style-name="T1">Track quantity</text:span></text:p>
          </table:table-cell>
          <table:table-cell table:style-name="Tabela10.B2" office:value-type="string">
            <text:p text:style-name="P11">✅ Marcar</text:p>
          </table:table-cell>
        </table:table-row>
        <table:table-row>
          <table:table-cell table:style-name="Tabela10.A2" office:value-type="string">
            <text:p text:style-name="Table_20_Contents"><text:span text:style-name="T1">Quantity</text:span></text:p>
          </table:table-cell>
          <table:table-cell table:style-name="Tabela10.B2" office:value-type="string">
            <text:p text:style-name="Table_20_Contents"><text:span text:style-name="T2">100</text:span></text:p>
          </table:table-cell>
        </table:table-row>
      </table:table>
      <text:p text:style-name="Text_20_body"/>
      <text:p text:style-name="Horizontal_20_Line"/>
      <text:h text:style-name="Heading_20_2" text:outline-level="2">💾 <text:span text:style-name="T1">Depois de preencher:</text:span></text:h>
      <text:p text:style-name="Text_20_body">Clique no botão <text:span text:style-name="T1">"Save"</text:span> (azul) no canto superior direito ou no final da página.</text:p>
      <text:p text:style-name="Horizontal_20_Line"/>
      <text:h text:style-name="Heading_20_2" text:outline-level="2">📝 <text:span text:style-name="T1">Resumo simples:</text:span></text:h>
      <text:list text:style-name="L14">
        <text:list-item>
          <text:p text:style-name="P28"><text:span text:style-name="T1">Ignore</text:span> a caixa de ajuda da Shopify</text:p>
        </text:list-item>
        <text:list-item>
          <text:p text:style-name="P28"><text:span text:style-name="T1">Role a página para baixo</text:span></text:p>
        </text:list-item>
        <text:list-item>
          <text:p text:style-name="P28"><text:span text:style-name="T1">Preencha</text:span> Preço e Quantidade</text:p>
        </text:list-item>
        <text:list-item>
          <text:p text:style-name="P28"><text:span text:style-name="T1">Clique em Save</text:span></text:p>
        </text:list-item>
      </text:list>
      <text:p text:style-name="Horizontal_20_Line"><text:soft-page-break/></text:p>
      <text:p text:style-name="Text_20_body"><text:span text:style-name="T1">Role a página para baixo agora e me diga se encontrou os campos de Preço e Quantidade!</text:span> 👇</text:p>
      <text:p text:style-name="P27">LOJA VIRTUAL</text:p>
      <text:p text:style-name="P27"/>
      <text:p text:style-name="Text_20_body"><text:span text:style-name="T1">Isso mesmo!</text:span> 👍</text:p>
      <text:p text:style-name="Horizontal_20_Line"/>
      <text:h text:style-name="Heading_20_2" text:outline-level="2">🏪 <text:span text:style-name="T1">Loja Virtual = E-commerce</text:span></text:h>
      <table:table table:name="Tabela11" table:style-name="Tabela11">
        <table:table-column table:style-name="Tabela11.A" table:number-columns-repeated="2"/>
        <table:table-header-rows>
          <table:table-row>
            <table:table-cell table:style-name="Tabela11.A1" office:value-type="string">
              <text:p text:style-name="P10">Termo</text:p>
            </table:table-cell>
            <table:table-cell table:style-name="Tabela11.B1" office:value-type="string">
              <text:p text:style-name="P10">Significado</text:p>
            </table:table-cell>
          </table:table-row>
        </table:table-header-rows>
        <table:table-row>
          <table:table-cell table:style-name="Tabela11.A2" office:value-type="string">
            <text:p text:style-name="Table_20_Contents"><text:span text:style-name="T1">Loja virtual</text:span></text:p>
          </table:table-cell>
          <table:table-cell table:style-name="Tabela11.B2" office:value-type="string">
            <text:p text:style-name="P11">Site onde você vende produtos online</text:p>
          </table:table-cell>
        </table:table-row>
        <table:table-row>
          <table:table-cell table:style-name="Tabela11.A2" office:value-type="string">
            <text:p text:style-name="Table_20_Contents"><text:span text:style-name="T1">Dono da loja</text:span></text:p>
          </table:table-cell>
          <table:table-cell table:style-name="Tabela11.B2" office:value-type="string">
            <text:p text:style-name="P11">Você (quem gerencia e vende)</text:p>
          </table:table-cell>
        </table:table-row>
        <table:table-row>
          <table:table-cell table:style-name="Tabela11.A2" office:value-type="string">
            <text:p text:style-name="Table_20_Contents"><text:span text:style-name="T1">Produtos</text:span></text:p>
          </table:table-cell>
          <table:table-cell table:style-name="Tabela11.B2" office:value-type="string">
            <text:p text:style-name="P11">Você que cria, descreve e define os preços</text:p>
          </table:table-cell>
        </table:table-row>
      </table:table>
      <text:p text:style-name="Text_20_body"/>
      <text:p text:style-name="Horizontal_20_Line"/>
      <text:h text:style-name="Heading_20_2" text:outline-level="2">📌 <text:span text:style-name="T1">Explicação simples:</text:span></text:h>
      <text:p text:style-name="Text_20_body">Você está construindo seu <text:span text:style-name="T1">próprio site de vendas</text:span> (como uma Amazon pessoal sua).</text:p>
      <text:list text:style-name="L15">
        <text:list-item>
          <text:p text:style-name="P29">✅ <text:span text:style-name="T1">Você decide</text:span> o que vender</text:p>
        </text:list-item>
        <text:list-item>
          <text:p text:style-name="P29">✅ <text:span text:style-name="T1">Você escreve</text:span> as descrições dos produtos</text:p>
        </text:list-item>
        <text:list-item>
          <text:p text:style-name="P29">✅ <text:span text:style-name="T1">Você define</text:span> os preços</text:p>
        </text:list-item>
      </text:list>
      <text:p text:style-name="Text_20_body"><text:span text:style-name="T1">Não é automático. Você faz tudo manualmente.</text:span></text:p>
      <text:p text:style-name="Horizontal_20_Line"/>
      <text:h text:style-name="Heading_20_2" text:outline-level="2">🌐 <text:span text:style-name="T1">Exemplos de lojas virtuais:</text:span></text:h>
      <table:table table:name="Tabela12" table:style-name="Tabela12">
        <table:table-column table:style-name="Tabela12.A" table:number-columns-repeated="2"/>
        <table:table-header-rows>
          <table:table-row>
            <table:table-cell table:style-name="Tabela12.A1" office:value-type="string">
              <text:p text:style-name="P10">Loja</text:p>
            </table:table-cell>
            <table:table-cell table:style-name="Tabela12.B1" office:value-type="string">
              <text:p text:style-name="P10">Tipo</text:p>
            </table:table-cell>
          </table:table-row>
        </table:table-header-rows>
        <table:table-row>
          <table:table-cell table:style-name="Tabela12.A2" office:value-type="string">
            <text:p text:style-name="P11">sua-loja.myshopify.com</text:p>
          </table:table-cell>
          <table:table-cell table:style-name="Tabela12.B2" office:value-type="string">
            <text:p text:style-name="Table_20_Contents">🎯 <text:span text:style-name="T1">É o que você está criando</text:span></text:p>
          </table:table-cell>
        </table:table-row>
        <table:table-row>
          <table:table-cell table:style-name="Tabela12.A2" office:value-type="string">
            <text:p text:style-name="P11">nike.com.br</text:p>
          </table:table-cell>
          <table:table-cell table:style-name="Tabela12.B2" office:value-type="string">
            <text:p text:style-name="P11">Loja virtual da Nike</text:p>
          </table:table-cell>
        </table:table-row>
        <table:table-row>
          <table:table-cell table:style-name="Tabela12.A2" office:value-type="string">
            <text:p text:style-name="P11">amazon.com</text:p>
          </table:table-cell>
          <table:table-cell table:style-name="Tabela12.B2" office:value-type="string">
            <text:p text:style-name="P11">Marketplace (outros vendem)</text:p>
          </table:table-cell>
        </table:table-row>
      </table:table>
      <text:p text:style-name="Text_20_body"/>
      <text:p text:style-name="Horizontal_20_Line"/>
      <text:h text:style-name="Heading_20_2" text:outline-level="2">🎯 <text:span text:style-name="T1">Resumo:</text:span></text:h>
      <text:p text:style-name="Quotations">"Você é o dono da loja virtual. Você preenche tudo. Não há fornecedor automático."</text:p>
      <text:p text:style-name="Text_20_body"><text:span text:style-name="T1">É exatamente isso!</text:span> Você está criando seu próprio e-commerce do zero.</text:p>
      <text:p text:style-name="Horizontal_20_Line"/>
      <text:p text:style-name="Text_20_body"><text:soft-page-break/><text:span text:style-name="T1">Agora faz sentido?</text:span> Continue preenchendo seu produto! 🚀</text:p>
      <text:p text:style-name="Text_20_body"/>
      <text:p text:style-name="P30">Onde tirar os produtos?</text:p>
      <text:p text:style-name="P30"/>
      <text:p text:style-name="Text_20_body">Ah, essa é uma ótima pergunta! Acho que entendi o que está te confundindo. Deixa eu te explicar.</text:p>
      <text:p text:style-name="Text_20_body">O lugar onde você <text:span text:style-name="T1">coloca os produtos que acabou de criar</text:span> (como a Summer T-Shirt) para os clientes verem, organizados bonitinhos na sua página inicial, é o <text:span text:style-name="T1">Editor da Loja Online</text:span> (Online Store Editor) .</text:p>
      <text:h text:style-name="Heading_20_3" text:outline-level="3">🎯 "Despachar" os Produtos para a Vitrine</text:h>
      <text:p text:style-name="Text_20_body">Você não precisa "tirar" os produtos de um lugar e jogar em outro. Eles já estão no sistema. O que você vai fazer agora é "despachar" eles para a vitrine, ou seja, <text:span text:style-name="T1">escolher onde e como eles vão aparecer</text:span> na sua página principal .</text:p>
      <text:h text:style-name="Heading_20_3" text:outline-level="3">🗺️ O Mapa do Tesouro (Onde Fica?)</text:h>
      <text:p text:style-name="Text_20_body">Para fazer isso, você vai seguir este caminho dentro do seu <text:span text:style-name="T1">Admin da Shopify</text:span> (que está em português):</text:p>
      <text:list text:style-name="L16">
        <text:list-item>
          <text:p text:style-name="P31">No menu lateral, clique em <text:span text:style-name="T1">"Canais de vendas"</text:span>.</text:p>
        </text:list-item>
        <text:list-item>
          <text:p text:style-name="P31">Depois, clique em <text:span text:style-name="T1">"Loja virtual"</text:span> .</text:p>
        </text:list-item>
        <text:list-item>
          <text:p text:style-name="P31">Em seguida, clique em <text:span text:style-name="T1">"Personalizar tema"</text:span> (ao lado do nome do seu tema, que provavelmente é o "Dawn" ou similar) .</text:p>
        </text:list-item>
      </text:list>
      <text:p text:style-name="Text_20_body">Isso vai abrir uma nova página: o <text:span text:style-name="T1">Editor da Loja Virtual</text:span>!</text:p>
      <text:h text:style-name="Heading_20_3" text:outline-level="3">🧑‍🎨 Como Usar o Editor (O "Photoshop" da sua Loja)</text:h>
      <text:p text:style-name="Text_20_body">Dentro desse Editor, você vai ver uma prévia ao vivo do seu site do lado direito e um menu de configurações do lado esquerdo . É aí que a mágica acontece:</text:p>
      <text:list text:style-name="L17">
        <text:list-item>
          <text:p text:style-name="P32"><text:span text:style-name="T1">Encontre a Seção de Produtos:</text:span> No menu da esquerda, clique na seção que mostra os produtos (pode se chamar "Coleção em destaque", "Produtos em destaque" ou algo assim).</text:p>
        </text:list-item>
        <text:list-item>
          <text:p text:style-name="P32"><text:span text:style-name="T1">Escolha os Produtos:</text:span> Ao selecionar essa seção, vão aparecer opções para você <text:span text:style-name="T1">escolher quais produtos</text:span> (ou qual coleção de produtos) você quer que apareça ali.</text:p>
        </text:list-item>
        <text:list-item>
          <text:p text:style-name="P32"><text:span text:style-name="T1">Solte os Produtos:</text:span> Você pode digitar o nome do produto (ex: "Summer T-Shirt") e selecioná-lo para que ele apareça naquele bloco da sua página inicial.</text:p>
        </text:list-item>
      </text:list>
      <text:p text:style-name="Quotations"><text:span text:style-name="T1">Detalhe super importante:</text:span> Para o produto aparecer na sua loja (front-end) e não só no admin, ele precisa estar com o status <text:span text:style-name="T1">"Ativo"</text:span> . Ao adicionar ou editar um produto, procure por "Status do produto" e mude de "Rascunho" para <text:span text:style-name="T1">"Ativo"</text:span> .</text:p>
      <text:h text:style-name="Heading_20_3" text:outline-level="3">💡 Simplificando</text:h>
      <text:p text:style-name="Text_20_body">Imagine que seu <text:span text:style-name="T1">Admin da Shopify</text:span> é o "estoque" e a <text:span text:style-name="T1">Loja Virtual</text:span> é a "vitrine".</text:p>
      <text:list text:style-name="L18">
        <text:list-item>
          <text:p text:style-name="P33"><text:soft-page-break/>Você já colocou o produto no estoque (na tela de <text:span text:style-name="T2">Adicionar produto</text:span>).</text:p>
        </text:list-item>
        <text:list-item>
          <text:p text:style-name="P33">Agora, você vai até a vitrine (no <text:span text:style-name="T2">Editor da Loja Online</text:span>) e decide: "este produto vai ficar nesta prateleira aqui".</text:p>
        </text:list-item>
      </text:list>
      <text:p text:style-name="Horizontal_20_Line"/>
      <text:h text:style-name="Heading_20_3" text:outline-level="3">⚠️ Sobre o Seu App Smart Alert Banner</text:h>
      <text:p text:style-name="Text_20_body">O app que você criou é uma <text:span text:style-name="T1">ferramenta de configuração</text:span>. Ele serve para você, o admin, criar textos e regras. O seu app <text:span text:style-name="T1">não</text:span> é o lugar onde os produtos da loja ficam ou são organizados.</text:p>
      <text:p text:style-name="Text_20_body">Você está no caminho certo. Continue que está quase lá</text:p>
      <text:p text:style-name="Text_20_body"/>
      <text:p text:style-name="P30">PERSONALIZAR TEMA:</text:p>
      <text:p text:style-name="Text_20_body"><text:span text:style-name="T1">Aqui está!</text:span> 👇</text:p>
      <text:p text:style-name="Text_20_body">Na sua imagem, o botão <text:span text:style-name="T1">"Editar tema"</text:span> é exatamente o que você precisa clicar!</text:p>
      <text:p text:style-name="Horizontal_20_Line"/>
      <text:h text:style-name="Heading_20_2" text:outline-level="2">✅ <text:span text:style-name="T1">Localização:</text:span></text:h>
      <text:p text:style-name="Text_20_body">No canto superior direito da tela, você vai ver:</text:p>
      <text:p text:style-name="P9">[ Editar tema ] ← CLIQUE AQUI!</text:p>
      <text:p text:style-name="Horizontal_20_Line"/>
      <text:h text:style-name="Heading_20_2" text:outline-level="2">🔍 <text:span text:style-name="T1">O que você vai encontrar:</text:span></text:h>
      <text:p text:style-name="Text_20_body">Depois de clicar em <text:span text:style-name="T1">"Editar tema"</text:span>, vai abrir o <text:span text:style-name="T1">Editor da Loja Virtual</text:span> (um visualizador ao vivo do seu site).</text:p>
      <text:p text:style-name="Horizontal_20_Line"/>
      <text:h text:style-name="Heading_20_2" text:outline-level="2">🎨 <text:span text:style-name="T1">Dentro do Editor, você vai:</text:span></text:h>
      <text:list text:style-name="L19">
        <text:list-item>
          <text:p text:style-name="P34"><text:span text:style-name="T1">Clicar na seção de produtos</text:span> (ex: "Featured collection")</text:p>
        </text:list-item>
        <text:list-item>
          <text:p text:style-name="P34"><text:span text:style-name="T1">Escolher seu produto</text:span> ("Summer T-Shirt")</text:p>
        </text:list-item>
        <text:list-item>
          <text:p text:style-name="P34"><text:span text:style-name="T1">Publicar as alterações</text:span></text:p>
        </text:list-item>
      </text:list>
      <text:p text:style-name="Horizontal_20_Line"/>
      <text:h text:style-name="Heading_20_2" text:outline-level="2">📸 <text:span text:style-name="T1">Na sua imagem, vejo que você já tem:</text:span></text:h>
      <table:table table:name="Tabela13" table:style-name="Tabela13">
        <table:table-column table:style-name="Tabela13.A" table:number-columns-repeated="2"/>
        <table:table-header-rows>
          <table:table-row>
            <table:table-cell table:style-name="Tabela13.A1" office:value-type="string">
              <text:p text:style-name="P10">Item</text:p>
            </table:table-cell>
            <table:table-cell table:style-name="Tabela13.B1" office:value-type="string">
              <text:p text:style-name="P10">Status</text:p>
            </table:table-cell>
          </table:table-row>
        </table:table-header-rows>
        <table:table-row>
          <table:table-cell table:style-name="Tabela13.A2" office:value-type="string">
            <text:p text:style-name="P11">Loja virtual</text:p>
          </table:table-cell>
          <table:table-cell table:style-name="Tabela13.B2" office:value-type="string">
            <text:p text:style-name="P11">✅ Aberta</text:p>
          </table:table-cell>
        </table:table-row>
        <table:table-row>
          <table:table-cell table:style-name="Tabela13.A2" office:value-type="string">
            <text:p text:style-name="P11">Tema Horizon</text:p>
          </table:table-cell>
          <table:table-cell table:style-name="Tabela13.B2" office:value-type="string">
            <text:p text:style-name="P11">✅ Instalado</text:p>
          </table:table-cell>
        </table:table-row>
        <table:table-row>
          <table:table-cell table:style-name="Tabela13.A2" office:value-type="string">
            <text:p text:style-name="P11">Botão Editar tema</text:p>
          </table:table-cell>
          <table:table-cell table:style-name="Tabela13.B2" office:value-type="string">
            <text:p text:style-name="P11">✅ Visível</text:p>
          </table:table-cell>
        </table:table-row>
      </table:table>
      <text:p text:style-name="Text_20_body"><text:soft-page-break/></text:p>
      <text:p text:style-name="Horizontal_20_Line"/>
      <text:h text:style-name="Heading_20_2" text:outline-level="2">🚀 <text:span text:style-name="T1">Próximo passo:</text:span></text:h>
      <text:p text:style-name="Text_20_body"><text:span text:style-name="T1">Clique em "Editar tema" e me mostre o que aparece!</text:span></text:p>
      <text:p text:style-name="Text_20_body">Vou te guiar para colocar seu produto na vitrine. 🎯</text:p>
      <text:p text:style-name="P35">NÃO É O ENDEREÇO DA LOJA</text:p>
      <text:p text:style-name="P35"/>
      <text:p text:style-name="Text_20_body">Não, esse endereço <text:span text:style-name="T1">não é a URL da sua loja virtual</text:span>.</text:p>
      <text:p text:style-name="Text_20_body">O link que você enviou é uma página restrita (erro 403) do <text:span text:style-name="T1">dashboard de desenvolvedor da Shopify</text:span>, usada para gerenciar as <text:span text:style-name="T1">versões do seu aplicativo</text:span>, não a loja em si.</text:p>
      <text:p text:style-name="Horizontal_20_Line"/>
      <text:h text:style-name="Heading_20_2" text:outline-level="2">✅ <text:span text:style-name="T1">Aqui estão os endereços corretos que você procura:</text:span></text:h>
      <table:table table:name="Tabela14" table:style-name="Tabela14">
        <table:table-column table:style-name="Tabela14.A" table:number-columns-repeated="3"/>
        <table:table-header-rows>
          <table:table-row>
            <table:table-cell table:style-name="Tabela14.A1" office:value-type="string">
              <text:p text:style-name="P10">O que você quer acessar</text:p>
            </table:table-cell>
            <table:table-cell table:style-name="Tabela14.A1" office:value-type="string">
              <text:p text:style-name="P10">URL correta</text:p>
            </table:table-cell>
            <table:table-cell table:style-name="Tabela14.C1" office:value-type="string">
              <text:p text:style-name="P10">Para que serve</text:p>
            </table:table-cell>
          </table:table-row>
        </table:table-header-rows>
        <table:table-row>
          <table:table-cell table:style-name="Tabela14.A2" office:value-type="string">
            <text:p text:style-name="Table_20_Contents"><text:span text:style-name="T1">Admin da sua loja</text:span> (painel de controle)</text:p>
          </table:table-cell>
          <table:table-cell table:style-name="Tabela14.A2" office:value-type="string">
            <text:p text:style-name="Table_20_Contents"><text:span text:style-name="T2">https://admin.shopify.com/store/smart-banner-test-ntcz3ygy</text:span></text:p>
          </table:table-cell>
          <table:table-cell table:style-name="Tabela14.C2" office:value-type="string">
            <text:p text:style-name="P11">Gerenciar produtos, pedidos, configurações.</text:p>
          </table:table-cell>
        </table:table-row>
        <table:table-row>
          <table:table-cell table:style-name="Tabela14.A2" office:value-type="string">
            <text:p text:style-name="Table_20_Contents"><text:span text:style-name="T1">Sua loja virtual</text:span> (site dos clientes)</text:p>
          </table:table-cell>
          <table:table-cell table:style-name="Tabela14.A2" office:value-type="string">
            <text:p text:style-name="Table_20_Contents"><text:span text:style-name="T2">https://smart-banner-test-ntcz3ygy.myshopify.com</text:span></text:p>
          </table:table-cell>
          <table:table-cell table:style-name="Tabela14.C2" office:value-type="string">
            <text:p text:style-name="P11">O site que seus clientes vão ver para comprar.</text:p>
          </table:table-cell>
        </table:table-row>
        <table:table-row>
          <table:table-cell table:style-name="Tabela14.A2" office:value-type="string">
            <text:p text:style-name="Table_20_Contents"><text:span text:style-name="T1">Seu App (Smart Alert Banner)</text:span></text:p>
          </table:table-cell>
          <table:table-cell table:style-name="Tabela14.A2" office:value-type="string">
            <text:p text:style-name="Table_20_Contents">No admin da loja, vá em <text:span text:style-name="T1">Apps</text:span> → <text:span text:style-name="T1">smart-alert-banner</text:span></text:p>
          </table:table-cell>
          <table:table-cell table:style-name="Tabela14.C2" office:value-type="string">
            <text:p text:style-name="P11">A página de configuração do seu banner.</text:p>
          </table:table-cell>
        </table:table-row>
      </table:table>
      <text:p text:style-name="Text_20_body"/>
      <text:p text:style-name="Horizontal_20_Line"/>
      <text:h text:style-name="Heading_20_2" text:outline-level="2">🎯 <text:span text:style-name="T1">Como acessar sua loja virtual (vitrine):</text:span></text:h>
      <text:list text:style-name="L20">
        <text:list-item>
          <text:p text:style-name="P36">Faça login no <text:span text:style-name="T1">Admin da sua loja</text:span> (primeiro link da tabela).</text:p>
        </text:list-item>
        <text:list-item>
          <text:p text:style-name="P36">No menu lateral, clique em <text:span text:style-name="T1">"Canais de vendas"</text:span>.</text:p>
        </text:list-item>
        <text:list-item>
          <text:p text:style-name="P36">Clique em <text:span text:style-name="T1">"Loja virtual"</text:span>.</text:p>
        </text:list-item>
        <text:list-item>
          <text:p text:style-name="P36">Clique no botão <text:span text:style-name="T1">"Ver loja"</text:span> (geralmente no canto superior direito). Isso abrirá sua loja como os clientes a veem.</text:p>
        </text:list-item>
      </text:list>
      <text:p text:style-name="Text_20_body">O link que eu passei é o caminho mais direto para você ver sua loja online.</text:p>
      <text:p text:style-name="Horizontal_20_Line"/>
      <text:h text:style-name="Heading_20_2" text:outline-level="2"><text:soft-page-break/>🧭 <text:span text:style-name="T1">Resumo dos links importantes para você:</text:span></text:h>
      <text:list text:style-name="L21">
        <text:list-item>
          <text:p text:style-name="P37"><text:span text:style-name="T1">Para administrar a loja (adicionar produtos, ver pedidos):</text:span> use o primeiro link da tabela.</text:p>
        </text:list-item>
        <text:list-item>
          <text:p text:style-name="P37"><text:span text:style-name="T1">Para ver a loja como um cliente (site de compras):</text:span> use o segundo link da tabela.</text:p>
        </text:list-item>
        <text:list-item>
          <text:p text:style-name="P37"><text:span text:style-name="T1">Para configurar seu banner:</text:span> dentro do admin, vá em <text:span text:style-name="T1">Apps</text:span> e clique no nome do seu app.</text:p>
        </text:list-item>
      </text:list>
      <text:p text:style-name="Text_20_body">O link que você me enviou é uma área técnica de desenvolvimento. Foque nos links da tabela acima para gerenciar sua loja e ver seu trabalho no ar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7T10:57:21.491335800</meta:creation-date>
    <dc:date>2026-06-07T12:27:46.487527100</dc:date>
    <meta:editing-duration>PT10M21S</meta:editing-duration>
    <meta:editing-cycles>2</meta:editing-cycles>
    <meta:generator>LibreOffice/26.2.3.2$Windows_X86_64 LibreOffice_project/70e089b17412e4cb7773e41413306b17a2328c34</meta:generator>
    <meta:document-statistic meta:table-count="14" meta:image-count="0" meta:object-count="0" meta:page-count="25" meta:paragraph-count="453" meta:word-count="3855" meta:character-count="25594" meta:non-whitespace-character-count="20907"/>
  </office:meta>
</office:document-meta>
</file>